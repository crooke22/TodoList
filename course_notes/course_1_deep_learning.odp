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A000000F8D8401BD6.jpg" manifest:media-type="image/jpeg"/>
  <manifest:file-entry manifest:full-path="Pictures/100000010000018E0000018EA1715AF9.tif" manifest:media-type="image/tiff"/>
  <manifest:file-entry manifest:full-path="Pictures/1000000100000142000000ECB306BA26.png" manifest:media-type="image/png"/>
  <manifest:file-entry manifest:full-path="Pictures/10000001000000140000000CCAAA6A8B.png" manifest:media-type="image/png"/>
  <manifest:file-entry manifest:full-path="Pictures/10000001000000140000000C97F05FAB.png" manifest:media-type="image/png"/>
  <manifest:file-entry manifest:full-path="Pictures/10000001000000140000000CD8090583.png" manifest:media-type="image/png"/>
  <manifest:file-entry manifest:full-path="Pictures/10000001000005D1000003665B39E81F.png" manifest:media-type="image/png"/>
  <manifest:file-entry manifest:full-path="Pictures/10000B44000002050000014A7C537662.svg" manifest:media-type="image/svg+xml"/>
  <manifest:file-entry manifest:full-path="Pictures/1000000100000142000000DF84BDF6F9.png" manifest:media-type="image/png"/>
  <manifest:file-entry manifest:full-path="Pictures/10000001000000140000000C0323C93D.png" manifest:media-type="image/png"/>
  <manifest:file-entry manifest:full-path="Pictures/100009E6000002050000014A93EE71AE.svg" manifest:media-type="image/svg+xml"/>
  <manifest:file-entry manifest:full-path="Pictures/10000A2D000002050000014A3258B204.svg" manifest:media-type="image/svg+xml"/>
  <manifest:file-entry manifest:full-path="Pictures/10000AF2000002050000014A63737B22.svg" manifest:media-type="image/svg+xml"/>
  <manifest:file-entry manifest:full-path="Pictures/100000010000002C0000000EB16A444B.png" manifest:media-type="image/png"/>
  <manifest:file-entry manifest:full-path="Pictures/10000F90000004880000016817CBBED0.svg" manifest:media-type="image/svg+xml"/>
  <manifest:file-entry manifest:full-path="Pictures/100015F90000047B00000151C27EA9DA.svg" manifest:media-type="image/svg+xml"/>
  <manifest:file-entry manifest:full-path="Pictures/100013C80000047B00000151981343FA.svg" manifest:media-type="image/svg+xml"/>
  <manifest:file-entry manifest:full-path="Pictures/100000010000079E000002F25C160971.png" manifest:media-type="image/png"/>
  <manifest:file-entry manifest:full-path="Pictures/10000001000000140000000C44A7123D.png" manifest:media-type="image/png"/>
  <manifest:file-entry manifest:full-path="Pictures/100000010000079E000002F2CA658C34.png" manifest:media-type="image/png"/>
  <manifest:file-entry manifest:full-path="Pictures/100000010000048D000004F1527984D8.png" manifest:media-type="image/png"/>
  <manifest:file-entry manifest:full-path="Pictures/100000010000042F0000048E205DCF6D.png" manifest:media-type="image/png"/>
  <manifest:file-entry manifest:full-path="Pictures/100000010000013A00000011E9D27F49.png" manifest:media-type="image/png"/>
  <manifest:file-entry manifest:full-path="Pictures/100000010000098F0000037E6785E929.png" manifest:media-type="image/png"/>
  <manifest:file-entry manifest:full-path="Pictures/1000B10600002079000001BCA88BA0A6.svg" manifest:media-type="image/svg+xml"/>
  <manifest:file-entry manifest:full-path="Pictures/10000001000000380000001081BCC73F.png" manifest:media-type="image/png"/>
  <manifest:file-entry manifest:full-path="Pictures/TablePreview2.svm" manifest:media-type=""/>
  <manifest:file-entry manifest:full-path="Pictures/10002785000005CE0000019B62958E1F.svg" manifest:media-type="image/svg+xml"/>
  <manifest:file-entry manifest:full-path="Pictures/10000000000001F40000014D39989D35.png" manifest:media-type="image/png"/>
  <manifest:file-entry manifest:full-path="Pictures/10000000000001F40000014D98F11F4F.png" manifest:media-type="image/png"/>
  <manifest:file-entry manifest:full-path="Pictures/10000001000001AA0000001162EC2147.png" manifest:media-type="image/png"/>
  <manifest:file-entry manifest:full-path="Pictures/10000D15000002050000014A4E5C09F0.svg" manifest:media-type="image/svg+xml"/>
  <manifest:file-entry manifest:full-path="Pictures/10000001000000EF00000015D9BD5FCF.png" manifest:media-type="image/png"/>
  <manifest:file-entry manifest:full-path="Pictures/1000148B00000478000001512E64F221.svg" manifest:media-type="image/svg+xml"/>
  <manifest:file-entry manifest:full-path="Pictures/10000000000001F40000014CF1222DF8.png" manifest:media-type="image/png"/>
  <manifest:file-entry manifest:full-path="Pictures/1000848B000018AA0000023681912D83.svg" manifest:media-type="image/svg+xml"/>
  <manifest:file-entry manifest:full-path="Pictures/1000DEDD000028FF000001AA20B9DDFD.svg" manifest:media-type="image/svg+xml"/>
  <manifest:file-entry manifest:full-path="Pictures/100000010000018D0000001057BC6F6F.png" manifest:media-type="image/png"/>
  <manifest:file-entry manifest:full-path="Pictures/10000001000000710000000E92D6E4D9.png" manifest:media-type="image/png"/>
  <manifest:file-entry manifest:full-path="Pictures/100000000000035C00000285D4D86698.png" manifest:media-type="image/png"/>
  <manifest:file-entry manifest:full-path="Pictures/100013320000047800000151DEB0F115.svg" manifest:media-type="image/svg+xml"/>
  <manifest:file-entry manifest:full-path="Pictures/1000000100000475000004216F7F42AE.png" manifest:media-type="image/png"/>
  <manifest:file-entry manifest:full-path="Pictures/10000001000007D7000004AD51AC5013.png" manifest:media-type="image/png"/>
  <manifest:file-entry manifest:full-path="Pictures/10000001000000260000000E053D695A.png" manifest:media-type="image/png"/>
  <manifest:file-entry manifest:full-path="Pictures/100000010000002B0000000D5A517DF2.png" manifest:media-type="image/png"/>
  <manifest:file-entry manifest:full-path="Pictures/100000010000002B0000000DC32C7258.png" manifest:media-type="image/png"/>
  <manifest:file-entry manifest:full-path="Pictures/100000010000004E00000047DC5EBC82.png" manifest:media-type="image/png"/>
  <manifest:file-entry manifest:full-path="Pictures/1000C69400000C5200000D2AA08AAE56.svg" manifest:media-type="image/svg+xml"/>
  <manifest:file-entry manifest:full-path="Pictures/10000001000001E1000000E17A23C8CD.png" manifest:media-type="image/png"/>
  <manifest:file-entry manifest:full-path="Pictures/100000010000057C000003149D91BA36.png" manifest:media-type="image/png"/>
  <manifest:file-entry manifest:full-path="Pictures/1000686B000011AD000001BCB665E467.svg" manifest:media-type="image/svg+xml"/>
  <manifest:file-entry manifest:full-path="Pictures/100000010000004900000011DC993421.png" manifest:media-type="image/png"/>
  <manifest:file-entry manifest:full-path="Pictures/100000010000057C000003142601DF17.png" manifest:media-type="image/png"/>
  <manifest:file-entry manifest:full-path="Pictures/1000E2CD00002C14000001CC74654531.svg" manifest:media-type="image/svg+xml"/>
  <manifest:file-entry manifest:full-path="Pictures/1000292400000A8500000167BE3F3C0B.svg" manifest:media-type="image/svg+xml"/>
  <manifest:file-entry manifest:full-path="Pictures/TablePreview3.svm" manifest:media-type=""/>
  <manifest:file-entry manifest:full-path="Pictures/100000010000012E000000CB08781F6A.png" manifest:media-type="image/png"/>
  <manifest:file-entry manifest:full-path="Pictures/100000010000008200000050266F300C.png" manifest:media-type="image/png"/>
  <manifest:file-entry manifest:full-path="Pictures/TablePreview1.svm" manifest:media-type=""/>
  <manifest:file-entry manifest:full-path="Pictures/1000000100000176000000E12945BDD0.png" manifest:media-type="image/png"/>
  <manifest:file-entry manifest:full-path="Pictures/10000001000000660000000E7C39BCAF.png" manifest:media-type="image/png"/>
  <manifest:file-entry manifest:full-path="Pictures/1000000000000442000002B3392DD805.jpg" manifest:media-type="image/jpeg"/>
  <manifest:file-entry manifest:full-path="Pictures/10000001000000770000007F1E05ECF4.png" manifest:media-type="image/png"/>
  <manifest:file-entry manifest:full-path="Pictures/10000001000000300000000D813232DE.png" manifest:media-type="image/png"/>
  <manifest:file-entry manifest:full-path="Pictures/1000000100000BCB000004F3EBFBDDD9.png" manifest:media-type="image/png"/>
  <manifest:file-entry manifest:full-path="Pictures/1000000100000141000000D62E638D64.png" manifest:media-type="image/png"/>
  <manifest:file-entry manifest:full-path="Pictures/10000001000001BB00000025A350275F.png" manifest:media-type="image/png"/>
  <manifest:file-entry manifest:full-path="Pictures/100000010000002B0000000DA6D74BFB.png" manifest:media-type="image/png"/>
  <manifest:file-entry manifest:full-path="Pictures/10002808000008B0000002CD1897360D.svg" manifest:media-type="image/svg+xml"/>
  <manifest:file-entry manifest:full-path="Pictures/100000000000032A00000211BA567B27.png" manifest:media-type="image/png"/>
  <manifest:file-entry manifest:full-path="Pictures/10003695000009AF000002CD742EE690.svg" manifest:media-type="image/svg+xml"/>
  <manifest:file-entry manifest:full-path="Pictures/100000010000005E0000001BFC081419.png" manifest:media-type="image/png"/>
  <manifest:file-entry manifest:full-path="Pictures/10000000000001FD000000B45886E8C3.png" manifest:media-type="image/png"/>
  <manifest:file-entry manifest:full-path="Pictures/10002C330000095A000000F89F3004EC.svg" manifest:media-type="image/svg+xml"/>
  <manifest:file-entry manifest:full-path="Pictures/100000010000005A00000009B907528F.png" manifest:media-type="image/png"/>
  <manifest:file-entry manifest:full-path="Pictures/10000001000001DC000000E061CB0ACC.png" manifest:media-type="image/png"/>
  <manifest:file-entry manifest:full-path="Pictures/1000000100000032000000119519213A.png" manifest:media-type="image/png"/>
  <manifest:file-entry manifest:full-path="Pictures/1000235E00000816000000F8FF3323D4.svg" manifest:media-type="image/svg+xml"/>
  <manifest:file-entry manifest:full-path="Pictures/100000010000004E0000000943DF30CF.png" manifest:media-type="image/png"/>
  <manifest:file-entry manifest:full-path="Pictures/10001E980000078B000001BCEDA546C8.svg" manifest:media-type="image/svg+xml"/>
  <manifest:file-entry manifest:full-path="Pictures/10000001000000AB0000001128BA80CC.png" manifest:media-type="image/png"/>
  <manifest:file-entry manifest:full-path="Pictures/1000000100000147000000DC761C6507.png" manifest:media-type="image/png"/>
  <manifest:file-entry manifest:full-path="Pictures/1001103400002DD5000003DFEE80F6BA.svg" manifest:media-type="image/svg+xml"/>
  <manifest:file-entry manifest:full-path="Pictures/100026900000076300000155827DC8D7.svg" manifest:media-type="image/svg+xml"/>
  <manifest:file-entry manifest:full-path="Pictures/10000001000000540000001BF044ED3D.png" manifest:media-type="image/png"/>
  <manifest:file-entry manifest:full-path="Pictures/10000001000000470000000DCF6C9D3A.png" manifest:media-type="image/png"/>
  <manifest:file-entry manifest:full-path="Pictures/100000010000002B0000000D6B61F59A.png" manifest:media-type="image/png"/>
  <manifest:file-entry manifest:full-path="Pictures/1000185F000004F70000015F3C5D3A8E.svg" manifest:media-type="image/svg+xml"/>
  <manifest:file-entry manifest:full-path="Pictures/10000001000000490000001134623C10.png" manifest:media-type="image/png"/>
  <manifest:file-entry manifest:full-path="Pictures/10001AC5000003F90000017A0C517C05.svg" manifest:media-type="image/svg+xml"/>
  <manifest:file-entry manifest:full-path="Pictures/100021680000078B000001BC86C65C41.svg" manifest:media-type="image/svg+xml"/>
  <manifest:file-entry manifest:full-path="Pictures/10001F6400000536000001BC0B9CED85.svg" manifest:media-type="image/svg+xml"/>
  <manifest:file-entry manifest:full-path="Pictures/10002F3F00000BB3000001679DBF8394.svg" manifest:media-type="image/svg+xml"/>
  <manifest:file-entry manifest:full-path="Pictures/10000001000005930000047BBCC591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Light" svg:font-family="'DejaVu Sans Light'" style:font-family-generic="swiss"/>
    <style:font-face style:name="DejaVu Sans Light1" svg:font-family="'DejaVu Sans Light'" style:font-adornments="Regular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Light3" svg:font-family="'DejaVu Sans Light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  <style:font-face style:name="TexMaths Symbols1" svg:font-family="'TexMaths Symbols'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03cm" fo:min-width="8.978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draw:auto-grow-height="false" fo:min-height="1.047cm" fo:min-width="0.797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75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3.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1cm" fo:min-width="21.99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8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888cm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0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6.90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07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29cm" fo:min-width="7.755cm" fo:padding-top="0.15cm" fo:padding-bottom="0.15cm" fo:padding-left="0.275cm" fo:padding-right="0.27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0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6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8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5.77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212cm" fo:min-width="18.899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2cm, 11.643cm, 2.889cm, 0cm)" draw:image-opacity="100%" style:mirror="non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7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628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67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23.73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9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838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7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4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39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82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5.44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5.862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26.847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2.293cm" fo:min-width="3.726cm" fo:padding-top="0cm" fo:padding-bottom="0cm" fo:padding-left="0cm" fo:padding-right="0cm" fo:wrap-option="wrap" loext:decorative="false"/>
    </style:style>
    <style:style style:name="gr45" style:family="graphic" style:parent-style-name="standard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6.134cm" fo:min-width="9.201cm" fo:padding-top="0cm" fo:padding-bottom="0cm" fo:padding-left="0cm" fo:padding-right="0cm" fo:wrap-option="wrap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26.117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26.97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45cm" fo:min-width="26.259cm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5.819cm" fo:min-width="8.656cm" fo:padding-top="0cm" fo:padding-bottom="0cm" fo:padding-left="0cm" fo:padding-right="0cm" fo:wrap-option="wrap" loext:decorative="false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width="0cm" draw:fill="bitmap" draw:fill-image-name="msFillBitmap_20_9" style:repeat="stretch" draw:textarea-horizontal-align="justify" draw:textarea-vertical-align="top" draw:auto-grow-height="false" draw:fit-to-size="false" style:shrink-to-fit="false" fo:min-height="6.449cm" fo:min-width="10.72cm" fo:padding-top="0cm" fo:padding-bottom="0cm" fo:padding-left="0cm" fo:padding-right="0cm" fo:wrap-option="wrap" loext:decorative="false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cm" draw:fill="bitmap" draw:fill-image-name="msFillBitmap_20_10" style:repeat="stretch" draw:textarea-horizontal-align="justify" draw:textarea-vertical-align="top" draw:auto-grow-height="false" draw:fit-to-size="false" style:shrink-to-fit="false" fo:min-height="6.449cm" fo:min-width="13.787cm" fo:padding-top="0cm" fo:padding-bottom="0cm" fo:padding-left="0cm" fo:padding-right="0cm" fo:wrap-option="wrap" loext:decorative="false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bitmap" draw:fill-image-name="msFillBitmap_20_19" style:repeat="stretch" draw:textarea-horizontal-align="justify" draw:textarea-vertical-align="top" draw:auto-grow-height="false" draw:fit-to-size="false" style:shrink-to-fit="false" fo:min-height="6.421cm" fo:min-width="13.644cm" fo:padding-top="0cm" fo:padding-bottom="0cm" fo:padding-left="0cm" fo:padding-right="0cm" fo:wrap-option="wrap" loext:decorative="false"/>
    </style:style>
    <style:style style:name="gr57" style:family="graphic" style:parent-style-name="standard">
      <style:graphic-properties draw:stroke="none" draw:fill="none" fo:min-height="0.866cm" loext:decorative="false"/>
      <style:paragraph-properties style:writing-mode="lr-tb"/>
    </style:style>
    <style:style style:name="gr58" style:family="graphic">
      <style:graphic-properties style:writing-mode="lr-tb" loext:decorative="false"/>
    </style:style>
    <style:style style:name="gr5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60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37cm" fo:min-width="0.289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1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6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1cm, 0cm, 0cm, 0cm)" draw:image-opacity="100%" style:mirror="none" loext:decorative="false"/>
    </style:style>
    <style:style style:name="gr63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38cm" fo:min-width="0.289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5cm, 0cm, 0cm, 0cm)" draw:image-opacity="100%" style:mirror="none" loext:decorative="false"/>
    </style:style>
    <style:style style:name="gr6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37cm" fo:min-width="0.287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7" style:family="graphic" style:parent-style-name="standard" style:list-style-name="L6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0.798cm" fo:min-width="0.6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4.01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cm" fo:min-width="0cm" loext:decorative="false"/>
      <style:paragraph-properties style:writing-mode="lr-tb"/>
    </style:style>
    <style:style style:name="pr1" style:family="presentation" style:parent-style-name="Default-title">
      <style:graphic-properties draw:textarea-vertical-align="middle" fo:min-height="2.63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textarea-vertical-align="middle" fo:min-height="2.629cm" loext:decorative="false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2.957cm" loext:decorative="false"/>
      <style:paragraph-properties style:writing-mode="lr-tb"/>
    </style:style>
    <style:style style:name="pr8" style:family="presentation" style:parent-style-name="Default-title">
      <style:graphic-properties draw:textarea-vertical-align="middle" fo:min-height="3.625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764cm" style:use-optimal-column-width="false"/>
    </style:style>
    <style:style style:name="co4" style:family="table-column">
      <style:table-column-properties style:column-width="3.516cm" style:use-optimal-column-width="false"/>
    </style:style>
    <style:style style:name="co5" style:family="table-column">
      <style:table-column-properties style:column-width="0.779cm" style:use-optimal-column-width="false"/>
    </style:style>
    <style:style style:name="co6" style:family="table-column">
      <style:table-column-properties style:column-width="4.067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71cm" style:use-optimal-row-height="false"/>
    </style:style>
    <style:style style:name="ro3" style:family="table-row">
      <style:table-row-properties style:row-height="0.814cm" style:use-optimal-row-height="false"/>
    </style:style>
    <style:style style:name="ro4" style:family="table-row">
      <style:table-row-properties style:row-height="0.809cm" style:use-optimal-row-height="false"/>
    </style:style>
    <style:style style:name="ce1" style:family="table-cell">
      <style:text-properties style:font-name="DejaVu Sans Light3"/>
    </style:style>
    <style:style style:name="ce2" style:family="table-cell">
      <style:text-properties style:font-name="DejaVu Sans Light2" fo:font-weight="200"/>
    </style:style>
    <style:style style:name="ce3" style:family="table-cell">
      <style:text-properties style:font-name="DejaVu Sans Light3" fo:font-size="15pt" style:font-size-asian="15pt" style:font-size-complex="15pt"/>
    </style:style>
    <style:style style:name="ce4" style:family="table-cell">
      <style:text-properties style:font-name="DejaVu Sans Light1" fo:font-size="15pt" style:font-size-asian="15pt" style:font-size-complex="15pt"/>
    </style:style>
    <style:style style:name="ce5" style:family="table-cell">
      <style:paragraph-properties fo:text-align="center"/>
      <style:text-properties style:font-name="DejaVu Sans Light3" fo:font-size="15pt" style:font-size-asian="15pt" style:font-size-complex="15pt"/>
    </style:style>
    <style:style style:name="ce6" style:family="table-cell">
      <style:paragraph-properties fo:text-align="center"/>
      <style:text-properties style:font-name="DejaVu Sans Light3" fo:font-size="13pt" style:font-size-asian="13pt" style:font-size-complex="13pt"/>
    </style:style>
    <style:style style:name="P1" style:family="paragraph">
      <style:text-properties style:font-name="DejaVu Sans Light3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Light3" style:font-name-asian="DejaVu Sans Light3"/>
    </style:style>
    <style:style style:name="P4" style:family="paragraph">
      <loext:graphic-properties draw:fill-color="#ffffff"/>
    </style:style>
    <style:style style:name="P5" style:family="paragraph">
      <style:text-properties style:font-name="DejaVu Sans Light3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style:font-name="DejaVu Sans Light3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DejaVu Sans Light3"/>
    </style:style>
    <style:style style:name="P10" style:family="paragraph">
      <loext:graphic-properties draw:fill="none"/>
    </style:style>
    <style:style style:name="P11" style:family="paragraph">
      <style:text-properties style:font-name="DejaVu Sans Light2" fo:font-weight="200"/>
    </style:style>
    <style:style style:name="P12" style:family="paragraph">
      <style:text-properties style:font-name="DejaVu Sans Light3" fo:font-size="15pt" style:font-size-asian="15pt" style:font-size-complex="15pt"/>
    </style:style>
    <style:style style:name="P13" style:family="paragraph">
      <style:text-properties style:font-name="DejaVu Sans Light1" fo:font-size="15pt" style:font-size-asian="15pt" style:font-size-complex="15pt"/>
    </style:style>
    <style:style style:name="P14" style:family="paragraph">
      <style:paragraph-properties fo:text-align="center"/>
      <style:text-properties style:font-name="DejaVu Sans Light3" fo:font-size="15pt" style:font-size-asian="15pt" style:font-size-complex="15pt"/>
    </style:style>
    <style:style style:name="P15" style:family="paragraph">
      <style:paragraph-properties fo:text-align="center"/>
      <style:text-properties style:font-name="DejaVu Sans Light3" fo:font-size="13pt" style:font-size-asian="13pt" style:font-size-complex="13pt"/>
    </style:style>
    <style:style style:name="P16" style:family="paragraph">
      <style:paragraph-properties fo:margin-top="0.5cm" fo:margin-bottom="0cm" fo:text-align="center"/>
    </style:style>
    <style:style style:name="P17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8" style:family="paragraph">
      <loext:graphic-properties draw:fill="none" draw:fill-color="#ffffff"/>
      <style:text-properties style:font-name="DejaVu Sans Light3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loext:graphic-properties draw:fill="bitmap" draw:fill-image-name="msFillBitmap_20_6" style:repeat="stretch"/>
      <style:paragraph-properties fo:text-align="lef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>
      <loext:graphic-properties draw:fill="bitmap" draw:fill-image-name="msFillBitmap_20_7" style:repeat="stretch"/>
      <style:paragraph-properties fo:text-align="lef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1" style:family="paragraph">
      <style:paragraph-properties fo:margin-left="0.035cm" fo:margin-right="0cm" fo:margin-top="0.044cm" fo:margin-bottom="0cm" fo:line-height="100%" fo:text-align="left" fo:text-indent="0cm"/>
      <style:text-properties fo:font-size="18pt"/>
    </style:style>
    <style:style style:name="P22" style:family="paragraph">
      <loext:graphic-properties draw:fill="none"/>
      <style:paragraph-properties fo:margin-left="0.035cm" fo:margin-right="0cm" fo:margin-top="0.044cm" fo:margin-bottom="0cm" fo:line-height="100%" fo:text-align="left" fo:text-indent="0cm" style:writing-mode="lr-tb" style:font-independent-line-spacing="true"/>
      <style:text-properties fo:font-size="18pt"/>
    </style:style>
    <style:style style:name="P23" style:family="paragraph">
      <loext:graphic-properties draw:fill="bitmap" draw:fill-image-name="msFillBitmap_20_8" style:repeat="stretch"/>
      <style:paragraph-properties fo:text-align="lef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4" style:family="paragraph">
      <loext:graphic-properties draw:fill="bitmap" draw:fill-image-name="msFillBitmap_20_9" style:repeat="stretch"/>
      <style:paragraph-properties fo:text-align="lef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5" style:family="paragraph">
      <loext:graphic-properties draw:fill="bitmap" draw:fill-image-name="msFillBitmap_20_10" style:repeat="stretch"/>
      <style:paragraph-properties fo:text-align="lef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6" style:family="paragraph">
      <loext:graphic-properties draw:fill="bitmap" draw:fill-image-name="msFillBitmap_20_19" style:repeat="stretch"/>
      <style:paragraph-properties fo:text-align="lef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left"/>
      <style:text-properties fo:font-size="18pt"/>
    </style:style>
    <style:style style:name="P2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0" style:family="paragraph">
      <loext:graphic-properties draw:fill="bitmap" draw:fill-image-name="msFillBitmap_20_1" style:repeat="stretch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style:font-name="DejaVu Sans Light3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DejaVu Sans Light3" fo:font-size="22pt" style:font-name-asian="DejaVu Sans Light3" style:font-size-asian="22pt" style:font-size-complex="22pt"/>
    </style:style>
    <style:style style:name="T3" style:family="text">
      <style:text-properties style:font-name="DejaVu Sans Light3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DejaVu Sans Light3" fo:font-size="28pt" style:font-size-asian="28pt" style:font-size-complex="28pt"/>
    </style:style>
    <style:style style:name="T5" style:family="text">
      <style:text-properties style:font-name="DejaVu Sans Light3"/>
    </style:style>
    <style:style style:name="T6" style:family="text">
      <style:text-properties style:font-name="DejaVu Sans Light3" fo:font-size="15pt" style:font-size-asian="15pt" style:font-size-complex="15pt"/>
    </style:style>
    <style:style style:name="T7" style:family="text">
      <style:text-properties style:text-position="sub 58%" style:font-name="DejaVu Sans Light" style:font-name-asian="DejaVu Sans Light" style:font-name-complex="DejaVu Sans Light"/>
    </style:style>
    <style:style style:name="T8" style:family="text">
      <style:text-properties style:font-name="DejaVu Sans Light3" fo:font-size="36pt" style:font-size-asian="36pt" style:font-size-complex="36pt"/>
    </style:style>
    <style:style style:name="T9" style:family="text">
      <style:text-properties style:font-name="DejaVu Sans Light2" fo:font-weight="200"/>
    </style:style>
    <style:style style:name="T10" style:family="text">
      <style:text-properties style:font-name="DejaVu Sans Light3" fo:font-size="16pt" style:font-size-asian="16pt" style:font-size-complex="16pt"/>
    </style:style>
    <style:style style:name="T11" style:family="text">
      <style:text-properties style:font-name="DejaVu Sans Light1" fo:font-size="15pt" style:font-size-asian="15pt" style:font-size-complex="15pt"/>
    </style:style>
    <style:style style:name="T12" style:family="text">
      <style:text-properties style:font-name="DejaVu Sans Light3" fo:font-size="13pt" style:font-size-asian="13pt" style:font-size-complex="13pt"/>
    </style:style>
    <style:style style:name="T13" style:family="text">
      <style:text-properties style:font-name="DejaVu Sans Light3" fo:font-size="13pt" style:font-name-asian="Liberation Sans" style:font-size-asian="13pt" style:font-name-complex="Liberation Sans" style:font-size-complex="13pt"/>
    </style:style>
    <style:style style:name="T14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5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16" style:family="text">
      <style:text-properties style:font-name="DejaVu Sans Light3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17" style:family="text">
      <style:text-properties style:text-position="super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8" style:family="text">
      <style:text-properties style:text-position="0% 100%" style:font-name="DejaVu Sans Light" fo:font-size="18pt" fo:font-style="normal" style:text-underline-style="none" fo:font-weight="normal" style:font-name-asian="DejaVu Sans Light" style:font-size-asian="18pt" style:font-style-asian="normal" style:font-weight-asian="normal" style:font-name-complex="DejaVu Sans Light" style:font-size-complex="18pt" style:font-style-complex="normal" style:font-weight-complex="normal"/>
    </style:style>
    <style:style style:name="T19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0" style:family="text">
      <style:text-properties style:font-name="DejaVu Sans Light3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2.5pt" fo:letter-spacing="0.035cm" fo:font-style="normal" style:text-underline-style="none" fo:font-weight="normal" fo:background-color="transparent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2.5pt" fo:letter-spacing="0.012cm" fo:font-style="normal" style:text-underline-style="none" fo:font-weight="normal" fo:background-color="transparent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2.5pt" fo:letter-spacing="0.055cm" fo:font-style="normal" style:text-underline-style="none" fo:font-weight="normal" fo:background-color="transparent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2.5pt" fo:letter-spacing="0.049cm" fo:font-style="normal" style:text-underline-style="none" fo:font-weight="normal" fo:background-color="transparent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2.5pt" fo:letter-spacing="0.065cm" fo:font-style="normal" style:text-underline-style="none" fo:font-weight="normal" fo:background-color="transparent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2.5pt" fo:letter-spacing="-0.028cm" fo:font-style="normal" style:text-underline-style="none" fo:font-weight="normal" fo:background-color="transparent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2.5pt" fo:letter-spacing="0.058cm" fo:font-style="normal" style:text-underline-style="none" fo:font-weight="normal" fo:background-color="transparent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2.5pt" fo:letter-spacing="-0.035cm" fo:font-style="normal" style:text-underline-style="none" fo:font-weight="normal" fo:background-color="transparent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2.5pt" fo:letter-spacing="0.06cm" fo:font-style="normal" style:text-underline-style="none" fo:font-weight="normal" fo:background-color="transparent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language-complex="mr" style:country-complex="IN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5cm" svg:x="1.371cm" svg:y="4.307cm" presentation:class="title" presentation:user-transformed="true">
          <draw:text-box>
            <text:p><text:span text:style-name="T1">Cou</text:span><text:span text:style-name="T1">rse </text:span><text:span text:style-name="T1">1 </text:span><text:span text:style-name="T1">Neu</text:span><text:span text:style-name="T1">ral </text:span><text:span text:style-name="T1">Net</text:span><text:span text:style-name="T1">wor</text:span><text:span text:style-name="T1">ks </text:span><text:span text:style-name="T1">and </text:span><text:span text:style-name="T1">Dee</text:span><text:span text:style-name="T1">p </text:span><text:span text:style-name="T1">Lear</text:span><text:span text:style-name="T1">ning</text:span></text:p>
          </draw:text-box>
        </draw:frame>
        <draw:frame draw:style-name="gr1" draw:text-style-name="P3" draw:layer="layout" svg:width="9.478cm" svg:height="1.153cm" svg:x="9.425cm" svg:y="9.437cm">
          <draw:text-box>
            <text:p text:style-name="P2"><text:span text:style-name="T2">Htoo </text:span><text:span text:style-name="T2">Hlaing </text:span><text:span text:style-name="T2">Win </text:span><text:span text:style-name="T2">洪台吕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0.635cm" svg:y="1.181cm" presentation:class="title" presentation:user-transformed="true">
          <draw:text-box>
            <text:p><text:span text:style-name="T3">We</text:span><text:span text:style-name="T3">ek </text:span><text:span text:style-name="T3">1 - </text:span><text:span text:style-name="T3">Intr</text:span><text:span text:style-name="T3">odu</text:span><text:span text:style-name="T3">ctio</text:span><text:span text:style-name="T3">n to </text:span><text:span text:style-name="T3">Dee</text:span><text:span text:style-name="T3">p </text:span><text:span text:style-name="T3">Lea</text:span><text:span text:style-name="T3">rnin</text:span><text:span text:style-name="T3">g</text:span></text:p>
          </draw:text-box>
        </draw:frame>
        <draw:frame presentation:style-name="pr4" draw:text-style-name="P5" draw:layer="layout" svg:width="25.199cm" svg:height="5.38cm" svg:x="-0.635cm" svg:y="4.445cm" presentation:class="outline" presentation:user-transformed="true">
          <draw:text-box>
            <text:list text:style-name="L2">
              <text:list-item>
                <text:p><text:span text:style-name="T4">What is Neural Network?</text:span></text:p>
              </text:list-item>
              <text:list-item>
                <text:p><text:span text:style-name="T4">Supervised Learning with Neural Networks</text:span></text:p>
              </text:list-item>
              <text:list-item>
                <text:p><text:span text:style-name="T4">Why is Deep Learning taking off?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5">What is Neural Network?</text:span></text:p>
          </draw:text-box>
        </draw:frame>
        <draw:custom-shape draw:style-name="gr3" draw:text-style-name="P6" xml:id="id1" draw:id="id1" draw:layer="layout" svg:width="1.905cm" svg:height="1.905cm" svg:x="18.48cm" svg:y="8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1.905cm" svg:height="1.725cm" svg:x="13.4cm" svg:y="8.565cm">
          <draw:text-box>
            <text:p><text:span text:style-name="T5">Size</text:span></text:p>
            <text:p text:style-name="P2"><text:span text:style-name="T5">x </text:span></text:p>
          </draw:text-box>
        </draw:frame>
        <draw:frame draw:style-name="gr5" draw:text-style-name="P7" draw:layer="layout" svg:width="2.54cm" svg:height="1.725cm" svg:x="23.26cm" svg:y="8.385cm">
          <draw:text-box>
            <text:p><text:span text:style-name="T5">Price</text:span></text:p>
            <text:p text:style-name="P2"><text:span text:style-name="T5">y</text:span></text:p>
          </draw:text-box>
        </draw:frame>
        <draw:connector draw:style-name="gr6" draw:text-style-name="P8" draw:layer="layout" draw:type="line" svg:x1="20.385cm" svg:y1="9.338cm" svg:x2="23.515cm" svg:y2="9.355cm" draw:start-shape="id1" draw:start-glue-point="10" svg:d="M20385 9338l3130 17" svg:viewBox="0 0 3131 18">
          <text:p/>
        </draw:connector>
        <draw:connector draw:style-name="gr6" draw:text-style-name="P8" draw:layer="layout" draw:type="line" svg:x1="15.305cm" svg:y1="9.339cm" svg:x2="18.435cm" svg:y2="9.356cm" svg:d="M15305 9339l3130 17" svg:viewBox="0 0 3131 18">
          <text:p/>
        </draw:connector>
        <draw:connector draw:style-name="gr7" draw:text-style-name="P9" draw:layer="layout" draw:type="line" svg:x1="20.924cm" svg:y1="6.293cm" svg:x2="19.8cm" svg:y2="8.34cm" svg:d="M20924 6293l-1124 2047" svg:viewBox="0 0 1125 2048">
          <text:p/>
        </draw:connector>
        <draw:frame draw:style-name="gr8" draw:text-style-name="P10" draw:layer="layout" svg:width="2.808cm" svg:height="0.989cm" svg:x="19.75cm" svg:y="5.491cm">
          <draw:text-box>
            <text:p><text:span text:style-name="T5">Neuron</text:span></text:p>
          </draw:text-box>
        </draw:frame>
        <draw:frame draw:style-name="gr9" draw:text-style-name="P8" draw:layer="layout" svg:width="12.021cm" svg:height="7.62cm" svg:x="1.27cm" svg:y="3.175cm">
          <draw:image xlink:href="Pictures/1000000000000442000002B3392DD805.jpg" xlink:type="simple" xlink:show="embed" xlink:actuate="onLoad" draw:mime-type="image/jpeg">
            <text:p/>
          </draw:image>
        </draw:frame>
        <draw:frame draw:style-name="gr10" draw:text-style-name="P7" draw:layer="layout" svg:width="24.4cm" svg:height="2.462cm" svg:x="1.905cm" svg:y="12.143cm">
          <draw:text-box>
            <text:list text:style-name="L1">
              <text:list-item>
                <text:p><text:span text:style-name="T5">The </text:span><text:span text:style-name="T5">input </text:span><text:span text:style-name="T5">is the </text:span><text:span text:style-name="T5">size </text:span><text:span text:style-name="T5">of the </text:span><text:span text:style-name="T5">house </text:span><text:span text:style-name="T5">(x).</text:span></text:p>
              </text:list-item>
              <text:list-item>
                <text:p><text:span text:style-name="T5">The </text:span><text:span text:style-name="T5">outpu</text:span><text:span text:style-name="T5">t is </text:span><text:span text:style-name="T5">the </text:span><text:span text:style-name="T5">price </text:span><text:span text:style-name="T5">of the </text:span><text:span text:style-name="T5">house </text:span><text:span text:style-name="T5">(y).</text:span></text:p>
              </text:list-item>
              <text:list-item>
                <text:p><text:span text:style-name="T5">The </text:span><text:span text:style-name="T5">Neuro</text:span><text:span text:style-name="T5">n </text:span><text:span text:style-name="T5">imple</text:span><text:span text:style-name="T5">ment</text:span><text:span text:style-name="T5">s </text:span><text:span text:style-name="T5">ReLU </text:span><text:span text:style-name="T5">functi</text:span><text:span text:style-name="T5">on, </text:span><text:span text:style-name="T5">which </text:span><text:span text:style-name="T5">is the </text:span><text:span text:style-name="T5">red </text:span><text:span text:style-name="T5">line in </text:span><text:span text:style-name="T5">the </text:span><text:span text:style-name="T5">graph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<text:span text:style-name="T5">Wh</text:span><text:span text:style-name="T5">at </text:span><text:span text:style-name="T5">is </text:span><text:span text:style-name="T5">Ne</text:span><text:span text:style-name="T5">ur</text:span><text:span text:style-name="T5">al </text:span><text:span text:style-name="T5">Ne</text:span><text:span text:style-name="T5">tw</text:span><text:span text:style-name="T5">ork</text:span><text:span text:style-name="T5">?</text:span></text:p>
          </draw:text-box>
        </draw:frame>
        <draw:custom-shape draw:style-name="gr3" draw:text-style-name="P6" xml:id="id2" draw:id="id2" draw:layer="layout" svg:width="1.905cm" svg:height="1.905cm" svg:x="12.08cm" svg:y="5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3.16cm" svg:height="1.2cm" svg:x="3.8cm" svg:y="9.79cm">
          <draw:text-box>
            <text:p><text:span text:style-name="T5">wealth</text:span></text:p>
          </draw:text-box>
        </draw:frame>
        <draw:frame draw:style-name="gr5" draw:text-style-name="P7" draw:layer="layout" svg:width="2.54cm" svg:height="1.725cm" svg:x="21.825cm" svg:y="6.06cm">
          <draw:text-box>
            <text:p><text:span text:style-name="T5">Price</text:span></text:p>
            <text:p text:style-name="P2"><text:span text:style-name="T5">y</text:span></text:p>
          </draw:text-box>
        </draw:frame>
        <draw:connector draw:style-name="gr6" draw:text-style-name="P8" draw:layer="layout" draw:type="line" svg:x1="13.985cm" svg:y1="6.938cm" svg:x2="17.115cm" svg:y2="6.955cm" draw:start-shape="id2" draw:start-glue-point="10" svg:d="M13985 6938l3130 17" svg:viewBox="0 0 3131 18">
          <text:p/>
        </draw:connector>
        <draw:connector draw:style-name="gr6" draw:text-style-name="P8" draw:layer="layout" draw:type="line" svg:x1="8.79cm" svg:y1="3.796cm" svg:x2="11.995cm" svg:y2="4.328cm" draw:end-shape="id3" draw:end-glue-point="6" svg:d="M8790 3796l3205 532" svg:viewBox="0 0 3206 533">
          <text:p/>
        </draw:connector>
        <draw:frame draw:style-name="gr12" draw:text-style-name="P7" draw:layer="layout" svg:width="22.493cm" svg:height="3.321cm" svg:x="1.905cm" svg:y="12.143cm">
          <draw:text-box>
            <text:list text:style-name="L1">
              <text:list-header>
                <text:p><text:span text:style-name="T6">Multipl</text:span><text:span text:style-name="T6">e </text:span><text:span text:style-name="T6">Neural </text:span><text:span text:style-name="T6">Networ</text:span><text:span text:style-name="T6">k</text:span></text:p>
                <text:p><text:span text:style-name="T6">The </text:span><text:span text:style-name="T6">price </text:span><text:span text:style-name="T6">of the </text:span><text:span text:style-name="T6">house </text:span><text:span text:style-name="T6">can be </text:span><text:span text:style-name="T6">affecte</text:span><text:span text:style-name="T6">d not </text:span><text:span text:style-name="T6">only by</text:span></text:p>
              </text:list-header>
              <text:list-item>
                <text:p><text:span text:style-name="T6">Size of </text:span><text:span text:style-name="T6">the </text:span><text:span text:style-name="T6">house, </text:span><text:span text:style-name="T6">numbe</text:span><text:span text:style-name="T6">r of </text:span><text:span text:style-name="T6">bedroo</text:span><text:span text:style-name="T6">ms, </text:span><text:span text:style-name="T6">place </text:span><text:span text:style-name="T6">and </text:span><text:span text:style-name="T6">wealth</text:span></text:p>
              </text:list-item>
              <text:list-item>
                <text:p><text:span text:style-name="T6">The </text:span><text:span text:style-name="T6">role of </text:span><text:span text:style-name="T6">the </text:span><text:span text:style-name="T6">neural </text:span><text:span text:style-name="T6">networ</text:span><text:span text:style-name="T6">k is to </text:span><text:span text:style-name="T6">predict </text:span><text:span text:style-name="T6">the </text:span><text:span text:style-name="T6">price </text:span><text:span text:style-name="T6">and it </text:span><text:span text:style-name="T6">will </text:span><text:span text:style-name="T6">autom</text:span><text:span text:style-name="T6">atically </text:span></text:p>
                <text:p><text:span text:style-name="T6">genera</text:span><text:span text:style-name="T6">te the </text:span><text:span text:style-name="T6">hidden </text:span><text:span text:style-name="T6">units. </text:span><text:span text:style-name="T6">We </text:span><text:span text:style-name="T6">only </text:span><text:span text:style-name="T6">need </text:span><text:span text:style-name="T6">to </text:span><text:span text:style-name="T6">provid</text:span><text:span text:style-name="T6">e the </text:span><text:span text:style-name="T6">input x </text:span><text:span text:style-name="T6">and </text:span><text:span text:style-name="T6">the </text:span><text:span text:style-name="T6">output </text:span><text:span text:style-name="T6">y.</text:span></text:p>
              </text:list-item>
            </text:list>
          </draw:text-box>
        </draw:frame>
        <draw:custom-shape draw:style-name="gr3" draw:text-style-name="P6" xml:id="id3" draw:id="id3" draw:layer="layout" svg:width="1.905cm" svg:height="1.905cm" svg:x="11.995cm" svg:y="3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905cm" svg:height="1.905cm" svg:x="12.065cm" svg:y="8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" draw:id="id6" draw:layer="layout" svg:width="1.905cm" svg:height="1.905cm" svg:x="17.175cm" svg:y="6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3.81cm" svg:height="0.988cm" svg:x="3.485cm" svg:y="7.71cm">
          <draw:text-box>
            <text:p><text:span text:style-name="T5">zip </text:span><text:span text:style-name="T5">code</text:span></text:p>
          </draw:text-box>
        </draw:frame>
        <draw:frame draw:style-name="gr13" draw:text-style-name="P7" draw:layer="layout" svg:width="1.27cm" svg:height="0.988cm" svg:x="7.78cm" svg:y="3.225cm">
          <draw:text-box>
            <text:p><text:span text:style-name="T5">x</text:span><text:span text:style-name="T7">1</text:span></text:p>
          </draw:text-box>
        </draw:frame>
        <draw:frame draw:style-name="gr14" draw:text-style-name="P7" draw:layer="layout" svg:width="4.445cm" svg:height="1.09cm" svg:x="3.275cm" svg:y="5.46cm">
          <draw:text-box>
            <text:p><text:span text:style-name="T5">#bedro</text:span><text:span text:style-name="T5">oms</text:span></text:p>
          </draw:text-box>
        </draw:frame>
        <draw:frame draw:style-name="gr14" draw:text-style-name="P7" draw:layer="layout" svg:width="1.905cm" svg:height="1.09cm" svg:x="4.21cm" svg:y="3.29cm">
          <draw:text-box>
            <text:p><text:span text:style-name="T5">Size </text:span></text:p>
          </draw:text-box>
        </draw:frame>
        <draw:frame draw:style-name="gr13" draw:text-style-name="P7" draw:layer="layout" svg:width="1.27cm" svg:height="0.988cm" svg:x="7.88cm" svg:y="5.425cm">
          <draw:text-box>
            <text:p><text:span text:style-name="T5">x</text:span><text:span text:style-name="T7">2</text:span></text:p>
          </draw:text-box>
        </draw:frame>
        <draw:frame draw:style-name="gr13" draw:text-style-name="P7" draw:layer="layout" svg:width="1.27cm" svg:height="0.988cm" svg:x="7.78cm" svg:y="7.625cm">
          <draw:text-box>
            <text:p><text:span text:style-name="T5">x</text:span><text:span text:style-name="T7">3</text:span></text:p>
          </draw:text-box>
        </draw:frame>
        <draw:frame draw:style-name="gr13" draw:text-style-name="P7" xml:id="id8" draw:id="id8" draw:layer="layout" svg:width="1.27cm" svg:height="0.988cm" svg:x="7.78cm" svg:y="9.825cm">
          <draw:text-box>
            <text:p><text:span text:style-name="T5">x</text:span><text:span text:style-name="T7">4</text:span></text:p>
          </draw:text-box>
        </draw:frame>
        <draw:connector draw:style-name="gr6" draw:text-style-name="P8" draw:layer="layout" draw:type="line" svg:x1="8.791cm" svg:y1="3.796cm" svg:x2="12.065cm" svg:y2="9.543cm" draw:end-shape="id4" draw:end-glue-point="6" svg:d="M8791 3796l3274 5747" svg:viewBox="0 0 3275 5748">
          <text:p/>
        </draw:connector>
        <draw:connector draw:style-name="gr6" draw:text-style-name="P8" draw:layer="layout" draw:type="line" svg:x1="8.891cm" svg:y1="5.996cm" svg:x2="11.995cm" svg:y2="4.328cm" draw:end-shape="id3" draw:end-glue-point="6" svg:d="M8891 5996l3104-1668" svg:viewBox="0 0 3105 1669">
          <text:p/>
        </draw:connector>
        <draw:connector draw:style-name="gr6" draw:text-style-name="P8" draw:layer="layout" draw:type="line" svg:x1="8.716cm" svg:y1="8.271cm" svg:x2="11.995cm" svg:y2="4.328cm" draw:start-shape="id5" draw:start-glue-point="2" draw:end-shape="id3" draw:end-glue-point="6" svg:d="M8716 8271l3279-3943" svg:viewBox="0 0 3280 3944">
          <text:p/>
        </draw:connector>
        <draw:connector draw:style-name="gr6" draw:text-style-name="P8" draw:layer="layout" draw:type="line" svg:x1="8.793cm" svg:y1="10.396cm" svg:x2="11.995cm" svg:y2="4.328cm" draw:end-shape="id3" draw:end-glue-point="6" svg:d="M8793 10396l3202-6068" svg:viewBox="0 0 3203 6069">
          <text:p/>
        </draw:connector>
        <draw:connector draw:style-name="gr6" draw:text-style-name="P8" draw:layer="layout" draw:type="line" svg:x1="8.794cm" svg:y1="3.796cm" svg:x2="12.08cm" svg:y2="6.938cm" draw:end-shape="id2" draw:end-glue-point="6" svg:d="M8794 3796l3286 3142" svg:viewBox="0 0 3287 3143">
          <text:p/>
        </draw:connector>
        <draw:connector draw:style-name="gr6" draw:text-style-name="P8" draw:layer="layout" draw:type="line" svg:x1="8.895cm" svg:y1="5.996cm" svg:x2="12.08cm" svg:y2="6.938cm" draw:end-shape="id2" draw:end-glue-point="6" svg:d="M8895 5996l3185 942" svg:viewBox="0 0 3186 943">
          <text:p/>
        </draw:connector>
        <draw:connector draw:style-name="gr6" draw:text-style-name="P8" draw:layer="layout" draw:type="line" svg:x1="8.896cm" svg:y1="5.996cm" svg:x2="12.065cm" svg:y2="9.543cm" draw:end-shape="id4" draw:end-glue-point="6" svg:d="M8896 5996l3169 3547" svg:viewBox="0 0 3170 3548">
          <text:p/>
        </draw:connector>
        <draw:connector draw:style-name="gr6" draw:text-style-name="P8" draw:layer="layout" draw:type="line" svg:x1="8.716cm" svg:y1="8.271cm" svg:x2="12.08cm" svg:y2="6.938cm" draw:start-shape="id5" draw:start-glue-point="2" draw:end-shape="id2" draw:end-glue-point="6" svg:d="M8716 8271l3364-1333" svg:viewBox="0 0 3365 1334">
          <text:p/>
        </draw:connector>
        <draw:connector draw:style-name="gr6" draw:text-style-name="P8" draw:layer="layout" draw:type="line" svg:x1="8.798cm" svg:y1="10.396cm" svg:x2="12.08cm" svg:y2="6.938cm" draw:end-shape="id2" draw:end-glue-point="6" svg:d="M8798 10396l3282-3458" svg:viewBox="0 0 3283 3459">
          <text:p/>
        </draw:connector>
        <draw:connector draw:style-name="gr6" draw:text-style-name="P8" xml:id="id5" draw:id="id5" draw:layer="layout" draw:type="line" svg:x1="8.716cm" svg:y1="8.271cm" svg:x2="12.065cm" svg:y2="9.543cm" draw:end-shape="id4" draw:end-glue-point="6" svg:d="M8716 8271l3349 1272" svg:viewBox="0 0 3350 1273">
          <text:p/>
        </draw:connector>
        <draw:connector draw:style-name="gr6" draw:text-style-name="P8" draw:layer="layout" draw:type="line" svg:x1="8.8cm" svg:y1="10.396cm" svg:x2="12.065cm" svg:y2="9.543cm" draw:end-shape="id4" draw:end-glue-point="6" svg:d="M8800 10396l3265-853" svg:viewBox="0 0 3266 854">
          <text:p/>
        </draw:connector>
        <draw:connector draw:style-name="gr6" draw:text-style-name="P8" draw:layer="layout" draw:type="line" svg:x1="13.885cm" svg:y1="4.339cm" svg:x2="17.454cm" svg:y2="6.294cm" draw:end-shape="id6" draw:end-glue-point="5" svg:d="M13885 4339l3569 1955" svg:viewBox="0 0 3570 1956">
          <text:p/>
        </draw:connector>
        <draw:connector draw:style-name="gr6" draw:text-style-name="P8" draw:layer="layout" draw:type="line" svg:x1="13.985cm" svg:y1="9.539cm" svg:x2="17.454cm" svg:y2="7.641cm" draw:end-shape="id6" draw:end-glue-point="7" svg:d="M13985 9539l3469-1898" svg:viewBox="0 0 3470 1899">
          <text:p/>
        </draw:connector>
        <draw:connector draw:style-name="gr6" draw:text-style-name="P8" draw:layer="layout" draw:type="line" svg:x1="19.085cm" svg:y1="6.939cm" svg:x2="22.215cm" svg:y2="6.956cm" svg:d="M19085 6939l3130 17" svg:viewBox="0 0 3131 18">
          <text:p/>
        </draw:connector>
        <draw:connector draw:style-name="gr6" draw:text-style-name="P8" xml:id="id7" draw:id="id7" draw:layer="layout" draw:type="line" svg:x1="15.277cm" svg:y1="11.109cm" svg:x2="13.691cm" svg:y2="10.216cm" draw:end-shape="id4" draw:end-glue-point="9" svg:d="M15277 11109l-1586-893" svg:viewBox="0 0 1587 894">
          <text:p/>
        </draw:connector>
        <draw:connector draw:style-name="gr6" draw:text-style-name="P8" draw:layer="layout" draw:type="line" svg:x1="15.277cm" svg:y1="11.109cm" svg:x2="18.128cm" svg:y2="7.92cm" draw:start-shape="id7" draw:start-glue-point="2" draw:end-shape="id6" draw:end-glue-point="8" svg:d="M15277 11109l2851-3189" svg:viewBox="0 0 2852 3190">
          <text:p/>
        </draw:connector>
        <draw:connector draw:style-name="gr6" draw:text-style-name="P8" draw:layer="layout" draw:type="line" svg:x1="9.151cm" svg:y1="11.526cm" svg:x2="8.415cm" svg:y2="10.813cm" draw:end-shape="id8" draw:end-glue-point="2" svg:d="M9151 11526l-736-713" svg:viewBox="0 0 737 714">
          <text:p/>
        </draw:connector>
        <draw:frame draw:style-name="gr14" draw:text-style-name="P7" draw:layer="layout" svg:width="4.445cm" svg:height="1.09cm" svg:x="13.97cm" svg:y="10.975cm">
          <draw:text-box>
            <text:p><text:span text:style-name="T5">Hidden Unit</text:span></text:p>
          </draw:text-box>
        </draw:frame>
        <draw:frame draw:style-name="gr11" draw:text-style-name="P7" draw:layer="layout" svg:width="3.16cm" svg:height="1.2cm" svg:x="3.8cm" svg:y="9.79cm">
          <draw:text-box>
            <text:p><text:span text:style-name="T5">wealth</text:span></text:p>
          </draw:text-box>
        </draw:frame>
        <draw:frame draw:style-name="gr15" draw:text-style-name="P7" draw:layer="layout" svg:width="4.435cm" svg:height="1.138cm" svg:x="7.4cm" svg:y="11.327cm">
          <draw:text-box>
            <text:p><text:span text:style-name="T5">Input Lay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6cm" presentation:class="title" presentation:user-transformed="true">
          <draw:text-box>
            <text:p><text:span text:style-name="T8">Supervised Learning of Neural Network</text:span></text:p>
          </draw:text-box>
        </draw:frame>
        <draw:frame draw:style-name="gr16" draw:layer="layout" svg:width="14.098cm" svg:height="8.601cm" svg:x="2.148cm" svg:y="3.745cm">
          <table:table table:template-name="blue-dark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5">Input(x)</text:span></text:p>
              </table:table-cell>
              <table:table-cell table:style-name="ce2">
                <text:p text:style-name="P11"><text:span text:style-name="T9">Output(y)</text:span></text:p>
              </table:table-cell>
              <table:table-cell>
                <text:p text:style-name="P5"><text:span text:style-name="T5">Application</text:span></text:p>
              </table:table-cell>
            </table:table-row>
            <table:table-row table:style-name="ro1" table:default-cell-style-name="ce3">
              <table:table-cell table:style-name="blue-banded">
                <text:p><text:span text:style-name="T10">Home features</text:span></text:p>
              </table:table-cell>
              <table:table-cell>
                <text:p text:style-name="P12"><text:span text:style-name="T6">Price</text:span></text:p>
              </table:table-cell>
              <table:table-cell>
                <text:p text:style-name="P12"><text:span text:style-name="T6">Real Estate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6">Ad, user info</text:span></text:p>
              </table:table-cell>
              <table:table-cell>
                <text:p text:style-name="P12"><text:span text:style-name="T6">Click on ad?(0/1)</text:span></text:p>
              </table:table-cell>
              <table:table-cell>
                <text:p text:style-name="P12"><text:span text:style-name="T6">Online Advertising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6">Image</text:span></text:p>
              </table:table-cell>
              <table:table-cell>
                <text:p text:style-name="P12"><text:span text:style-name="T6">Object(1...1000)</text:span></text:p>
              </table:table-cell>
              <table:table-cell>
                <text:p text:style-name="P12"><text:span text:style-name="T6">Photo tagging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6">Audio</text:span></text:p>
              </table:table-cell>
              <table:table-cell>
                <text:p text:style-name="P12"><text:span text:style-name="T6">Text Transcript</text:span></text:p>
              </table:table-cell>
              <table:table-cell>
                <text:p text:style-name="P12"><text:span text:style-name="T6">Speech Recognitio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6">English</text:span></text:p>
              </table:table-cell>
              <table:table-cell>
                <text:p text:style-name="P12"><text:span text:style-name="T6">Chinese</text:span></text:p>
              </table:table-cell>
              <table:table-cell>
                <text:p text:style-name="P12"><text:span text:style-name="T6">Machine Translatio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6">Image, Radar info</text:span></text:p>
              </table:table-cell>
              <table:table-cell>
                <text:p text:style-name="P12"><text:span text:style-name="T6">Position of the cars</text:span></text:p>
              </table:table-cell>
              <table:table-cell table:style-name="ce4">
                <text:p text:style-name="P13"><text:span text:style-name="T11">Autonomous Driv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7" xml:id="id9" draw:id="id9" draw:layer="layout" svg:width="5.08cm" svg:height="0.988cm" svg:x="18.62cm" svg:y="5.28cm">
          <draw:text-box>
            <text:p><text:span text:style-name="T5">Standard NN</text:span></text:p>
          </draw:text-box>
        </draw:frame>
        <draw:connector draw:style-name="gr17" draw:text-style-name="P8" draw:layer="layout" draw:type="line" svg:x1="18.62cm" svg:y1="5.774cm" svg:x2="16.327cm" svg:y2="5.219cm" draw:start-shape="id9" draw:start-glue-point="3" svg:d="M18620 5774l-2293-555" svg:viewBox="0 0 2294 556">
          <text:p/>
        </draw:connector>
        <draw:connector draw:style-name="gr17" draw:text-style-name="P8" draw:layer="layout" draw:type="line" svg:x1="18.62cm" svg:y1="5.774cm" svg:x2="16.345cm" svg:y2="6.307cm" draw:start-shape="id9" draw:start-glue-point="3" svg:d="M18620 5774l-2275 533" svg:viewBox="0 0 2276 534">
          <text:p/>
        </draw:connector>
        <draw:frame draw:style-name="gr18" draw:text-style-name="P7" draw:layer="layout" svg:width="6.579cm" svg:height="1.31cm" svg:x="18.421cm" svg:y="7.68cm">
          <draw:text-box>
            <text:p><text:span text:style-name="T5">Convolutional NN</text:span></text:p>
          </draw:text-box>
        </draw:frame>
        <draw:connector draw:style-name="gr17" draw:text-style-name="P8" draw:layer="layout" draw:type="line" svg:x1="18.621cm" svg:y1="8.235cm" svg:x2="16.328cm" svg:y2="7.519cm" svg:d="M18621 8235l-2293-716" svg:viewBox="0 0 2294 717">
          <text:p/>
        </draw:connector>
        <draw:connector draw:style-name="gr17" draw:text-style-name="P8" draw:layer="layout" draw:type="line" svg:x1="18.621cm" svg:y1="8.235cm" svg:x2="16.346cm" svg:y2="8.607cm" svg:d="M18621 8235l-2275 372" svg:viewBox="0 0 2276 373">
          <text:p/>
        </draw:connector>
        <draw:frame draw:style-name="gr13" draw:text-style-name="P7" draw:layer="layout" svg:width="5.08cm" svg:height="0.988cm" svg:x="18.62cm" svg:y="9.78cm">
          <draw:text-box>
            <text:p><text:span text:style-name="T5">Rectified NN</text:span></text:p>
          </draw:text-box>
        </draw:frame>
        <draw:connector draw:style-name="gr17" draw:text-style-name="P8" draw:layer="layout" draw:type="line" svg:x1="18.622cm" svg:y1="10.235cm" svg:x2="16.345cm" svg:y2="10.258cm" svg:d="M18622 10235l-2277 23" svg:viewBox="0 0 2278 24">
          <text:p/>
        </draw:connector>
        <draw:frame draw:style-name="gr4" draw:text-style-name="P7" draw:layer="layout" svg:width="5.08cm" svg:height="1.725cm" svg:x="18.621cm" svg:y="11.08cm">
          <draw:text-box>
            <text:p><text:span text:style-name="T5">Hybrid(CNN and others)</text:span></text:p>
          </draw:text-box>
        </draw:frame>
        <draw:connector draw:style-name="gr17" draw:text-style-name="P8" draw:layer="layout" draw:type="line" svg:x1="18.623cm" svg:y1="11.535cm" svg:x2="16.346cm" svg:y2="11.558cm" svg:d="M18623 11535l-2277 23" svg:viewBox="0 0 2278 24">
          <text:p/>
        </draw:connector>
        <draw:frame draw:style-name="gr19" draw:text-style-name="P7" draw:layer="layout" svg:width="17.403cm" svg:height="2.462cm" svg:x="1.905cm" svg:y="12.766cm">
          <draw:text-box>
            <text:p><text:span text:style-name="T5">Supervised Learning :</text:span></text:p>
            <text:list text:style-name="L4">
              <text:list-item>
                <text:p><text:span text:style-name="T5">Regression : predict results with Continuous output</text:span></text:p>
              </text:list-item>
              <text:list-item>
                <text:p><text:span text:style-name="T5">Classification: predict results with discrete outpu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426cm" presentation:class="title" presentation:user-transformed="true">
          <draw:text-box>
            <text:p><text:span text:style-name="T8">Supervised Learning of Neural Network</text:span></text:p>
          </draw:text-box>
        </draw:frame>
        <draw:frame draw:style-name="gr16" draw:layer="layout" svg:width="11.125cm" svg:height="5.035cm" svg:x="0.939cm" svg:y="4.21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14"><text:span text:style-name="T6">Size</text:span></text:p>
              </table:table-cell>
              <table:table-cell>
                <text:p text:style-name="P14"><text:span text:style-name="T6">#bedrooms</text:span></text:p>
              </table:table-cell>
              <table:table-cell>
                <text:p text:style-name="P14"><text:span text:style-name="T6">...</text:span></text:p>
              </table:table-cell>
              <table:table-cell>
                <text:p text:style-name="P14"><text:span text:style-name="T6">Price (1000$)</text:span></text:p>
              </table:table-cell>
            </table:table-row>
            <table:table-row table:style-name="ro3" table:default-cell-style-name="ce6">
              <table:table-cell>
                <text:p text:style-name="P15"><text:span text:style-name="T12">2104</text:span></text:p>
              </table:table-cell>
              <table:table-cell>
                <text:p text:style-name="P15"><text:span text:style-name="T12">3</text:span></text:p>
              </table:table-cell>
              <table:table-cell/>
              <table:table-cell>
                <text:p text:style-name="P15"><text:span text:style-name="T12">400</text:span></text:p>
              </table:table-cell>
            </table:table-row>
            <table:table-row table:style-name="ro3" table:default-cell-style-name="ce6">
              <table:table-cell>
                <text:p text:style-name="P15"><text:span text:style-name="T12">1600</text:span></text:p>
              </table:table-cell>
              <table:table-cell>
                <text:p text:style-name="P15"><text:span text:style-name="T12">3</text:span></text:p>
              </table:table-cell>
              <table:table-cell/>
              <table:table-cell>
                <text:p text:style-name="P15"><text:span text:style-name="T12">330</text:span></text:p>
              </table:table-cell>
            </table:table-row>
            <table:table-row table:style-name="ro3" table:default-cell-style-name="ce6">
              <table:table-cell>
                <text:p text:style-name="P15"><text:span text:style-name="T12">2400</text:span></text:p>
              </table:table-cell>
              <table:table-cell>
                <text:p text:style-name="P15"><text:span text:style-name="T12">3</text:span></text:p>
              </table:table-cell>
              <table:table-cell/>
              <table:table-cell>
                <text:p text:style-name="P15"><text:span text:style-name="T12">369</text:span></text:p>
              </table:table-cell>
            </table:table-row>
            <table:table-row table:style-name="ro3" table:default-cell-style-name="ce6">
              <table:table-cell>
                <text:p text:style-name="P15"><text:span text:style-name="T13">⁞</text:span></text:p>
              </table:table-cell>
              <table:table-cell>
                <text:p text:style-name="P15"><text:span text:style-name="T13">⁞</text:span></text:p>
              </table:table-cell>
              <table:table-cell/>
              <table:table-cell>
                <text:p text:style-name="P15"><text:span text:style-name="T13">⁞</text:span></text:p>
              </table:table-cell>
            </table:table-row>
            <table:table-row table:style-name="ro4" table:default-cell-style-name="ce6">
              <table:table-cell>
                <text:p text:style-name="P15"><text:span text:style-name="T12">3000</text:span></text:p>
              </table:table-cell>
              <table:table-cell>
                <text:p text:style-name="P15"><text:span text:style-name="T12">4</text:span></text:p>
              </table:table-cell>
              <table:table-cell/>
              <table:table-cell>
                <text:p text:style-name="P15"><text:span text:style-name="T12">54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layer="layout" svg:width="11.125cm" svg:height="5.035cm" svg:x="0.94cm" svg:y="9.8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14"><text:span text:style-name="T6">User Age</text:span></text:p>
              </table:table-cell>
              <table:table-cell>
                <text:p text:style-name="P14"><text:span text:style-name="T6">Ad Id</text:span></text:p>
              </table:table-cell>
              <table:table-cell>
                <text:p text:style-name="P14"><text:span text:style-name="T6">...</text:span></text:p>
              </table:table-cell>
              <table:table-cell>
                <text:p text:style-name="P14"><text:span text:style-name="T6">Click</text:span></text:p>
              </table:table-cell>
            </table:table-row>
            <table:table-row table:style-name="ro3" table:default-cell-style-name="ce6">
              <table:table-cell>
                <text:p text:style-name="P15"><text:span text:style-name="T12">41</text:span></text:p>
              </table:table-cell>
              <table:table-cell>
                <text:p text:style-name="P15"><text:span text:style-name="T12">93242</text:span></text:p>
              </table:table-cell>
              <table:table-cell/>
              <table:table-cell>
                <text:p text:style-name="P15"><text:span text:style-name="T12">1</text:span></text:p>
              </table:table-cell>
            </table:table-row>
            <table:table-row table:style-name="ro3" table:default-cell-style-name="ce6">
              <table:table-cell>
                <text:p text:style-name="P15"><text:span text:style-name="T12">80</text:span></text:p>
              </table:table-cell>
              <table:table-cell>
                <text:p text:style-name="P15"><text:span text:style-name="T12">93287</text:span></text:p>
              </table:table-cell>
              <table:table-cell/>
              <table:table-cell>
                <text:p text:style-name="P15"><text:span text:style-name="T12">0</text:span></text:p>
              </table:table-cell>
            </table:table-row>
            <table:table-row table:style-name="ro3" table:default-cell-style-name="ce6">
              <table:table-cell>
                <text:p text:style-name="P15"><text:span text:style-name="T12">18</text:span></text:p>
              </table:table-cell>
              <table:table-cell>
                <text:p text:style-name="P15"><text:span text:style-name="T12">87312</text:span></text:p>
              </table:table-cell>
              <table:table-cell/>
              <table:table-cell>
                <text:p text:style-name="P15"><text:span text:style-name="T12">1</text:span></text:p>
              </table:table-cell>
            </table:table-row>
            <table:table-row table:style-name="ro3" table:default-cell-style-name="ce6">
              <table:table-cell>
                <text:p text:style-name="P15"><text:span text:style-name="T13">⁞</text:span></text:p>
              </table:table-cell>
              <table:table-cell>
                <text:p text:style-name="P15"><text:span text:style-name="T13">⁞</text:span></text:p>
              </table:table-cell>
              <table:table-cell/>
              <table:table-cell>
                <text:p text:style-name="P15"><text:span text:style-name="T13">⁞</text:span></text:p>
              </table:table-cell>
            </table:table-row>
            <table:table-row table:style-name="ro4" table:default-cell-style-name="ce6">
              <table:table-cell>
                <text:p text:style-name="P15"><text:span text:style-name="T12">27</text:span></text:p>
              </table:table-cell>
              <table:table-cell>
                <text:p text:style-name="P15"><text:span text:style-name="T12">71244</text:span></text:p>
              </table:table-cell>
              <table:table-cell/>
              <table:table-cell>
                <text:p text:style-name="P15"><text:span text:style-name="T12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0" draw:text-style-name="P7" draw:layer="layout" svg:width="5.577cm" svg:height="0.988cm" svg:x="3.34cm" svg:y="3.07cm">
          <draw:text-box>
            <text:p><text:span text:style-name="T5">Structured Data</text:span></text:p>
          </draw:text-box>
        </draw:frame>
        <draw:frame draw:style-name="gr21" draw:text-style-name="P7" draw:layer="layout" svg:width="6.889cm" svg:height="0.988cm" svg:x="17.241cm" svg:y="3.07cm">
          <draw:text-box>
            <text:p><text:span text:style-name="T5">Unstructured Data</text:span></text:p>
          </draw:text-box>
        </draw:frame>
        <draw:frame draw:style-name="gr9" draw:text-style-name="P8" draw:layer="layout" svg:width="7.182cm" svg:height="2.54cm" svg:x="13.335cm" svg:y="5.08cm">
          <draw:image xlink:href="Pictures/10000000000001FD000000B45886E8C3.png" xlink:type="simple" xlink:show="embed" xlink:actuate="onLoad" draw:mime-type="image/png">
            <text:p/>
          </draw:image>
        </draw:frame>
        <draw:frame draw:style-name="gr9" draw:text-style-name="P8" draw:layer="layout" svg:width="6.032cm" svg:height="4.017cm" svg:x="20.955cm" svg:y="4.445cm">
          <draw:image xlink:href="Pictures/10000000000001F40000014D39989D35.png" xlink:type="simple" xlink:show="embed" xlink:actuate="onLoad" draw:mime-type="image/png">
            <text:p/>
          </draw:image>
        </draw:frame>
        <draw:path draw:style-name="gr22" draw:text-style-name="P6" draw:layer="layout" svg:width="8.254cm" svg:height="2.539cm" svg:x="15.24cm" svg:y="10.06cm" svg:viewBox="0 0 8255 2540" svg:d="M0 2540c0-847 0-1693 0-2540 2752 0 5503 0 8255 0 0 847 0 1693 0 2540-2752 0-5503 0-8255 0z">
          <text:p/>
        </draw:path>
        <draw:frame draw:style-name="gr23" draw:text-style-name="P7" draw:layer="layout" svg:width="8.89cm" svg:height="1.725cm" svg:x="15.405cm" svg:y="10.795cm">
          <draw:text-box>
            <text:p><text:span text:style-name="T5">Hello NJUST Students...</text:span></text:p>
          </draw:text-box>
        </draw:frame>
        <draw:frame draw:style-name="gr24" draw:text-style-name="P7" draw:layer="layout" svg:width="2.307cm" svg:height="0.988cm" svg:x="15.64cm" svg:y="7.692cm">
          <draw:text-box>
            <text:p><text:span text:style-name="T5">Audio</text:span></text:p>
          </draw:text-box>
        </draw:frame>
        <draw:frame draw:style-name="gr25" draw:text-style-name="P7" draw:layer="layout" svg:width="2.469cm" svg:height="0.988cm" svg:x="23.441cm" svg:y="8.392cm">
          <draw:text-box>
            <text:p><text:span text:style-name="T5">Image</text:span></text:p>
          </draw:text-box>
        </draw:frame>
        <draw:frame draw:style-name="gr26" draw:text-style-name="P7" draw:layer="layout" svg:width="1.786cm" svg:height="0.988cm" svg:x="18.542cm" svg:y="12.492cm">
          <draw:text-box>
            <text:p><text:span text:style-name="T5">Tex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3">Why is deep learning taking off?</text:span></text:p>
          </draw:text-box>
        </draw:frame>
        <draw:frame draw:style-name="gr9" draw:text-style-name="P8" draw:layer="layout" svg:width="16.802cm" svg:height="10.021cm" svg:x="5.423cm" svg:y="2.679cm">
          <draw:image xlink:href="Pictures/10000001000007D7000004AD51AC5013.png" xlink:type="simple" xlink:show="embed" xlink:actuate="onLoad" draw:mime-type="image/png">
            <text:p/>
          </draw:image>
        </draw:frame>
        <draw:frame draw:style-name="gr27" draw:text-style-name="P7" draw:layer="layout" svg:width="16.276cm" svg:height="2.462cm" svg:x="5.07cm" svg:y="12.635cm">
          <draw:text-box>
            <text:p><text:span text:style-name="T5">To get the high level performance:</text:span></text:p>
            <text:list text:style-name="L1">
              <text:list-item>
                <text:p><text:span text:style-name="T5">Being able to train a big enough neural network</text:span></text:p>
              </text:list-item>
              <text:list-item>
                <text:p><text:span text:style-name="T5">Huge amount of labeled dat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3">Why is deep learning taking off?</text:span></text:p>
          </draw:text-box>
        </draw:frame>
        <draw:frame draw:style-name="gr28" draw:text-style-name="P7" draw:layer="layout" svg:width="19.399cm" svg:height="2.462cm" svg:x="3.97cm" svg:y="12.635cm">
          <draw:text-box>
            <text:p><text:span text:style-name="T5">It take a good amount of time to train a neural network,</text:span></text:p>
            <text:p><text:span text:style-name="T5">Affects my productivity. Faster computation helps to iterate</text:span></text:p>
            <text:p><text:span text:style-name="T5">And improve new Algorithm.</text:span></text:p>
          </draw:text-box>
        </draw:frame>
        <draw:frame draw:style-name="gr29" draw:text-style-name="P8" draw:layer="layout" svg:width="8.482cm" svg:height="8.889cm" svg:x="9.955cm" svg:y="3.341cm">
          <draw:image xlink:href="Pictures/100000000000035C00000285D4D86698.png" xlink:type="simple" xlink:show="embed" xlink:actuate="onLoad" draw:mime-type="image/png">
            <text:p/>
          </draw:image>
        </draw:frame>
        <draw:frame draw:style-name="gr30" draw:text-style-name="P7" draw:layer="layout" svg:width="1.872cm" svg:height="0.988cm" svg:x="13.005cm" svg:y="2.945cm">
          <draw:text-box>
            <text:p><text:span text:style-name="T5">Idea</text:span></text:p>
          </draw:text-box>
        </draw:frame>
        <draw:frame draw:style-name="gr31" draw:text-style-name="P7" draw:layer="layout" svg:width="2.128cm" svg:height="0.988cm" svg:x="16.805cm" svg:y="10.845cm">
          <draw:text-box>
            <text:p><text:span text:style-name="T5">Code</text:span></text:p>
          </draw:text-box>
        </draw:frame>
        <draw:frame draw:style-name="gr32" draw:text-style-name="P7" draw:layer="layout" svg:width="4.171cm" svg:height="0.988cm" svg:x="8.305cm" svg:y="10.845cm">
          <draw:text-box>
            <text:p><text:span text:style-name="T5">Experi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8">Week 2 Neural Network Basics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Binary Classification</text:span></text:p>
              </text:list-item>
              <text:list-item>
                <text:p><text:span text:style-name="T5">Logistic Regression: Cost Function</text:span></text:p>
              </text:list-item>
              <text:list-item>
                <text:p><text:span text:style-name="T5">Gradient Descent</text:span></text:p>
              </text:list-item>
              <text:list-item>
                <text:p><text:span text:style-name="T5">Python and Vectorizat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list text:style-name="L2">
              <text:list-header>
                <text:p text:style-name="P16"><text:span text:style-name="T8">Binary Classification</text:span></text:p>
              </text:list-header>
            </text:list>
          </draw:text-box>
        </draw:frame>
        <draw:frame draw:style-name="gr33" draw:text-style-name="P7" draw:layer="layout" svg:width="24.239cm" svg:height="4.673cm" svg:x="1.27cm" svg:y="3.786cm">
          <draw:text-box>
            <text:p><text:span text:style-name="T5">Binary Classification is an act of classifying the things using 1 or 0</text:span></text:p>
            <text:p><text:span text:style-name="T5">1 means true and 0 means false.</text:span></text:p>
            <text:p><text:span text:style-name="T5">To check image whether is it a cat or not, is binary classification.</text:span></text:p>
            <text:p><text:span text:style-name="T5">The most basic Neural Network is binary classification.</text:span></text:p>
            <text:p><text:span text:style-name="T5">Is to train that input x is an image and predicts whether the corresponding</text:span></text:p>
            <text:p><text:span text:style-name="T5">Label y is 1 or 0.</text:span></text:p>
          </draw:text-box>
        </draw:frame>
        <draw:frame draw:style-name="gr9" draw:text-style-name="P8" draw:layer="layout" svg:width="7.651cm" svg:height="5.08cm" svg:x="3.144cm" svg:y="8.89cm">
          <draw:image xlink:href="Pictures/10000000000001F40000014CF1222DF8.png" xlink:type="simple" xlink:show="embed" xlink:actuate="onLoad" draw:mime-type="image/png">
            <text:p/>
          </draw:image>
        </draw:frame>
        <draw:frame draw:style-name="gr34" draw:text-style-name="P7" draw:layer="layout" svg:width="5.096cm" svg:height="0.988cm" svg:x="4.11cm" svg:y="13.905cm">
          <draw:text-box>
            <text:p><text:span text:style-name="T5">1 This is a cat.</text:span></text:p>
          </draw:text-box>
        </draw:frame>
        <draw:frame draw:style-name="gr9" draw:text-style-name="P8" draw:layer="layout" svg:width="7.907cm" svg:height="5.18cm" svg:x="15.975cm" svg:y="8.79cm">
          <draw:image xlink:href="Pictures/10000000000001F40000014D98F11F4F.png" xlink:type="simple" xlink:show="embed" xlink:actuate="onLoad" draw:mime-type="image/png">
            <text:p/>
          </draw:image>
        </draw:frame>
        <draw:frame draw:style-name="gr35" draw:text-style-name="P7" draw:layer="layout" svg:width="6.338cm" svg:height="0.988cm" svg:x="16.91cm" svg:y="13.905cm">
          <draw:text-box>
            <text:p><text:span text:style-name="T5">0 This is not a cat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8">Logistic Regression</text:span></text:p>
          </draw:text-box>
        </draw:frame>
        <draw:frame draw:style-name="gr9" draw:text-style-name="P8" draw:layer="layout" svg:width="25.524cm" svg:height="1.034cm" svg:x="0.711cm" svg:y="3.72cm">
          <draw:image xlink:href="Pictures/1000DEDD000028FF000001AA20B9DDFD.svg" xlink:type="simple" xlink:show="embed" xlink:actuate="onLoad" draw:mime-type="image/svg+xml">
            <text:p/>
          </draw:image>
          <draw:image xlink:href="Pictures/100000010000018D0000001057BC6F6F.png" xlink:type="simple" xlink:show="embed" xlink:actuate="onLoad" draw:mime-type="image/png"/>
          <svg:title>TexMaths</svg:title>
          <svg:desc>28§display§$ \^{y}^{(i)} = \sigma(w^Tx^{(i)} + b) ,\hat{y}^{(i)}$ is the output label for $i^{th}$ training example§svg§600§TRUE§</svg:desc>
        </draw:frame>
        <draw:frame draw:style-name="gr9" draw:text-style-name="P8" draw:layer="layout" svg:width="12.667cm" svg:height="1.24cm" svg:x="2.938cm" svg:y="8.41cm">
          <draw:image xlink:href="Pictures/1000686B000011AD000001BCB665E467.svg" xlink:type="simple" xlink:show="embed" xlink:actuate="onLoad" draw:mime-type="image/svg+xml">
            <text:p/>
          </draw:image>
          <draw:image xlink:href="Pictures/10000001000000AB0000001128BA80CC.png" xlink:type="simple" xlink:show="embed" xlink:actuate="onLoad" draw:mime-type="image/png"/>
          <svg:title>TexMaths</svg:title>
          <svg:desc>28§display§\{(x^{(1)},y^{(1)}),\cdots,(x^{(m)},y^{(m)})\}§svg§600§TRUE§</svg:desc>
        </draw:frame>
        <draw:frame draw:style-name="gr9" draw:text-style-name="P8" draw:layer="layout" svg:width="17.676cm" svg:height="1.582cm" svg:x="0.792cm" svg:y="6.508cm">
          <draw:image xlink:href="Pictures/1000848B000018AA0000023681912D83.svg" xlink:type="simple" xlink:show="embed" xlink:actuate="onLoad" draw:mime-type="image/svg+xml">
            <text:p/>
          </draw:image>
          <draw:image xlink:href="Pictures/10000001000000EF00000015D9BD5FCF.png" xlink:type="simple" xlink:show="embed" xlink:actuate="onLoad" draw:mime-type="image/png"/>
          <svg:title>TexMaths</svg:title>
          <svg:desc>28§display§$\sigma(z^{(i)}) = \frac{1}{1 + e ^{-z^{(i)}}}$ is the sigmoid function§svg§600§TRUE§</svg:desc>
        </draw:frame>
        <draw:frame draw:style-name="gr9" draw:text-style-name="P8" draw:layer="layout" svg:width="4.158cm" svg:height="1.148cm" svg:x="3.942cm" svg:y="10.06cm">
          <draw:image xlink:href="Pictures/10002785000005CE0000019B62958E1F.svg" xlink:type="simple" xlink:show="embed" xlink:actuate="onLoad" draw:mime-type="image/svg+xml">
            <text:p/>
          </draw:image>
          <draw:image xlink:href="Pictures/10000001000000380000001081BCC73F.png" xlink:type="simple" xlink:show="embed" xlink:actuate="onLoad" draw:mime-type="image/png"/>
          <svg:title>TexMaths</svg:title>
          <svg:desc>28§display§$\^{y}^{(i)} \approx y^{(i)}$ §svg§600§TRUE§</svg:desc>
        </draw:frame>
        <draw:frame draw:style-name="gr36" draw:text-style-name="P17" draw:layer="layout" svg:width="26.9cm" svg:height="1.737cm" svg:x="0.405cm" svg:y="4.795cm">
          <draw:text-box>
            <text:p><text:span text:style-name="T14">w</text:span><text:span text:style-name="T15"> </text:span><text:span text:style-name="T16">is the weight, b is the bias and </text:span><text:span text:style-name="T14">x</text:span><text:span text:style-name="T17">(i) </text:span><text:span text:style-name="T18"><text:s/>is the </text:span><text:span text:style-name="T19">i</text:span><text:span text:style-name="T17">th</text:span><text:span text:style-name="T18"> example represented as a column vector</text:span></text:p>
          </draw:text-box>
        </draw:frame>
        <draw:frame draw:style-name="gr37" draw:text-style-name="P7" draw:layer="layout" svg:width="3.447cm" svg:height="0.988cm" svg:x="0.77cm" svg:y="10.195cm">
          <draw:text-box>
            <text:p><text:span text:style-name="T5">We want </text:span></text:p>
          </draw:text-box>
        </draw:frame>
        <draw:frame draw:style-name="gr38" draw:text-style-name="P7" draw:layer="layout" svg:width="2.339cm" svg:height="0.988cm" svg:x="0.67cm" svg:y="8.59cm">
          <draw:text-box>
            <text:p><text:span text:style-name="T5">Giv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8">Logistic Regression</text:span></text:p>
          </draw:text-box>
        </draw:frame>
        <draw:frame draw:style-name="gr39" draw:text-style-name="P2" draw:layer="layout" svg:width="31.592cm" svg:height="1.285cm" svg:x="1.185cm" svg:y="3.599cm">
          <draw:image xlink:href="Pictures/1000E2CD00002C14000001CC74654531.svg" xlink:type="simple" xlink:show="embed" xlink:actuate="onLoad" draw:mime-type="image/svg+xml">
            <text:p/>
          </draw:image>
          <draw:image xlink:href="Pictures/10000001000001AA0000001162EC2147.png" xlink:type="simple" xlink:show="embed" xlink:actuate="onLoad" draw:mime-type="image/png"/>
          <svg:title>TexMaths</svg:title>
          <svg:desc>28§display§$L(\^{y}^{(i)},y^{(i)}) = \frac{1}{2}(\hat{y}^{(i)} - y^{(i)})^2$ is the Loss error function, the less the better§svg§600§TRUE§</svg:desc>
        </draw:frame>
        <draw:frame draw:style-name="gr9" draw:text-style-name="P8" draw:layer="layout" svg:width="23.274cm" svg:height="1.24cm" svg:x="1.113cm" svg:y="5.779cm">
          <draw:image xlink:href="Pictures/1000B10600002079000001BCA88BA0A6.svg" xlink:type="simple" xlink:show="embed" xlink:actuate="onLoad" draw:mime-type="image/svg+xml">
            <text:p/>
          </draw:image>
          <draw:image xlink:href="Pictures/100000010000013A00000011E9D27F49.png" xlink:type="simple" xlink:show="embed" xlink:actuate="onLoad" draw:mime-type="image/png"/>
          <svg:title>TexMaths</svg:title>
          <svg:desc>28§display§L(\hat{y}^{(i)},y^{(i)}) = -((y^{(i)}log(\hat{y}^{(i)}) + (1 - y^{(i)})log(1 - \hat{y}^{(i)}))§svg§600§TRUE§</svg:desc>
        </draw:frame>
        <draw:frame draw:style-name="gr9" draw:text-style-name="P8" draw:layer="layout" svg:width="25.825cm" svg:height="2.18cm" svg:x="1.006cm" svg:y="8.636cm">
          <draw:image xlink:href="Pictures/1001103400002DD5000003DFEE80F6BA.svg" xlink:type="simple" xlink:show="embed" xlink:actuate="onLoad" draw:mime-type="image/svg+xml">
            <text:p/>
          </draw:image>
          <draw:image xlink:href="Pictures/10000001000001BB00000025A350275F.png" xlink:type="simple" xlink:show="embed" xlink:actuate="onLoad" draw:mime-type="image/png"/>
          <svg:title>TexMaths</svg:title>
          <svg:desc>28§display§J(w, b) = \frac{1}{m} \sum_{i=1}^m L(\hat{y}^{(i)},y^{(i)}) = -\frac{1}{m} \sum_{i=1}^m [(y^{(i)}log(\hat{y}^{(i)}) + (1 - y^{(i)})log(1 - \hat{y}^{(i)})]§svg§600§TRUE§</svg:desc>
        </draw:frame>
        <draw:frame draw:style-name="gr40" draw:text-style-name="P7" draw:layer="layout" svg:width="21.321cm" svg:height="0.988cm" svg:x="0.97cm" svg:y="7.655cm">
          <draw:text-box>
            <text:p><text:span text:style-name="T5">Cost Function is the average of the loss function of the entire set.</text:span></text:p>
          </draw:text-box>
        </draw:frame>
        <draw:frame draw:style-name="gr41" draw:text-style-name="P7" draw:layer="layout" svg:width="25.949cm" svg:height="1.725cm" svg:x="0.87cm" svg:y="11.03cm">
          <draw:text-box>
            <text:p><text:span text:style-name="T5">And then we are going to find the parameters w and b that minimize the overall</text:span></text:p>
            <text:p><text:span text:style-name="T5">Cost functio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8">Gradient Descent</text:span></text:p>
          </draw:text-box>
        </draw:frame>
        <draw:frame draw:style-name="gr9" draw:text-style-name="P8" draw:layer="layout" svg:width="25.825cm" svg:height="2.18cm" svg:x="1.006cm" svg:y="2.936cm">
          <draw:image xlink:href="Pictures/1001103400002DD5000003DFEE80F6BA.svg" xlink:type="simple" xlink:show="embed" xlink:actuate="onLoad" draw:mime-type="image/svg+xml">
            <text:p/>
          </draw:image>
          <draw:image xlink:href="Pictures/10000001000001BB00000025A350275F.png" xlink:type="simple" xlink:show="embed" xlink:actuate="onLoad" draw:mime-type="image/png"/>
          <svg:title>TexMaths</svg:title>
          <svg:desc>28§display§J(w, b) = \frac{1}{m} \sum_{i=1}^m L(\hat{y}^{(i)},y^{(i)}) = -\frac{1}{m} \sum_{i=1}^m [(y^{(i)}log(\hat{y}^{(i)}) + (1 - y^{(i)})log(1 - \hat{y}^{(i)})]§svg§600§TRUE§</svg:desc>
        </draw:frame>
        <draw:frame draw:style-name="gr42" draw:text-style-name="P7" draw:layer="layout" svg:width="26.362cm" svg:height="2.462cm" svg:x="0.67cm" svg:y="11.13cm">
          <draw:text-box>
            <text:p><text:span text:style-name="T5">In order to find w, b that minimize J(w, b), We have to use backward propagation.</text:span></text:p>
            <text:p><text:span text:style-name="T5">Which is using derivative.</text:span></text:p>
            <text:p><text:span text:style-name="T5"><text:tab/></text:span><text:span text:style-name="T5">dZ = A – Y </text:span></text:p>
          </draw:text-box>
        </draw:frame>
        <draw:frame draw:style-name="gr9" draw:text-style-name="P8" draw:layer="layout" svg:width="9.525cm" svg:height="6.22cm" svg:x="8.255cm" svg:y="5.116cm">
          <draw:image xlink:href="Pictures/100000000000032A00000211BA567B27.png" xlink:type="simple" xlink:show="embed" xlink:actuate="onLoad" draw:mime-type="image/png">
            <text:p/>
          </draw:image>
        </draw:frame>
        <draw:frame draw:style-name="gr9" draw:text-style-name="P8" draw:layer="layout" svg:width="5.52cm" svg:height="1.595cm" svg:x="7.535cm" svg:y="12.298cm">
          <draw:image xlink:href="Pictures/10003695000009AF000002CD742EE690.svg" xlink:type="simple" xlink:show="embed" xlink:actuate="onLoad" draw:mime-type="image/svg+xml">
            <text:p/>
          </draw:image>
          <draw:image xlink:href="Pictures/100000010000005E0000001BFC081419.png" xlink:type="simple" xlink:show="embed" xlink:actuate="onLoad" draw:mime-type="image/png"/>
          <svg:title>TexMaths</svg:title>
          <svg:desc>28§display§dW = \frac{1}{m} X * dZ§svg§600§TRUE§</svg:desc>
        </draw:frame>
        <draw:frame draw:style-name="gr9" draw:text-style-name="P8" draw:layer="layout" svg:width="6.131cm" svg:height="1.975cm" svg:x="14.749cm" svg:y="12.065cm">
          <draw:image xlink:href="Pictures/10002808000008B0000002CD1897360D.svg" xlink:type="simple" xlink:show="embed" xlink:actuate="onLoad" draw:mime-type="image/svg+xml">
            <text:p/>
          </draw:image>
          <draw:image xlink:href="Pictures/10000001000000540000001BF044ED3D.png" xlink:type="simple" xlink:show="embed" xlink:actuate="onLoad" draw:mime-type="image/png"/>
          <svg:title>TexMaths</svg:title>
          <svg:desc>28§display§db = \frac{1}{m} \sum{dZ}§svg§600§TRUE§</svg:desc>
        </draw:frame>
        <draw:frame draw:style-name="gr9" draw:text-style-name="P8" draw:layer="layout" svg:width="6.7cm" svg:height="0.692cm" svg:x="3.818cm" svg:y="14.291cm">
          <draw:image xlink:href="Pictures/10002C330000095A000000F89F3004EC.svg" xlink:type="simple" xlink:show="embed" xlink:actuate="onLoad" draw:mime-type="image/svg+xml">
            <text:p/>
          </draw:image>
          <draw:image xlink:href="Pictures/100000010000005A00000009B907528F.png" xlink:type="simple" xlink:show="embed" xlink:actuate="onLoad" draw:mime-type="image/png"/>
          <svg:title>TexMaths</svg:title>
          <svg:desc>28§display§w = w - \alpha * dw§svg§600§TRUE§</svg:desc>
        </draw:frame>
        <draw:frame draw:style-name="gr9" draw:text-style-name="P8" draw:layer="layout" svg:width="5.793cm" svg:height="0.692cm" svg:x="13.473cm" svg:y="14.291cm">
          <draw:image xlink:href="Pictures/1000235E00000816000000F8FF3323D4.svg" xlink:type="simple" xlink:show="embed" xlink:actuate="onLoad" draw:mime-type="image/svg+xml">
            <text:p/>
          </draw:image>
          <draw:image xlink:href="Pictures/100000010000004E0000000943DF30CF.png" xlink:type="simple" xlink:show="embed" xlink:actuate="onLoad" draw:mime-type="image/png"/>
          <svg:title>TexMaths</svg:title>
          <svg:desc>28§display§b = b - \alpha * db§svg§600§TRUE§</svg:desc>
        </draw:frame>
        <draw:frame draw:style-name="gr23" draw:text-style-name="P18" draw:layer="layout" svg:width="7.62cm" svg:height="1.725cm" svg:x="19.685cm" svg:y="14.17cm">
          <draw:text-box>
            <text:p><text:span text:style-name="T20">α is the learning rat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8">Python and Vectorization</text:span></text:p>
          </draw:text-box>
        </draw:frame>
        <draw:frame draw:style-name="gr43" draw:text-style-name="P7" draw:layer="layout" svg:width="27.347cm" svg:height="4.673cm" svg:x="0.37cm" svg:y="3.93cm">
          <draw:text-box>
            <text:p><text:span text:style-name="T5">In Neural Network, we should avoid explicit use of for loop which makes your</text:span></text:p>
            <text:p><text:span text:style-name="T5">Algorithm slower. In order to solve this we can vectorize input x and weight and </text:span></text:p>
            <text:p><text:span text:style-name="T5">Bias. There is numpy function we can use, which is np.dot. This is the dot product</text:span></text:p>
            <text:p><text:span text:style-name="T5">Of two vectors and we must be careful of the shapes, this is the most common error</text:span></text:p>
            <text:p><text:span text:style-name="T5">When we use vectorize version.</text:span></text:p>
            <text:p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8">Week 3 Shallow Neural Network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What is Neural Network?</text:span></text:p>
              </text:list-item>
              <text:list-item>
                <text:p><text:span text:style-name="T5">Neural Network representation</text:span></text:p>
              </text:list-item>
              <text:list-item>
                <text:p><text:span text:style-name="T5">Vectorization across multiple examples</text:span></text:p>
              </text:list-item>
              <text:list-item>
                <text:p><text:span text:style-name="T5">Activation Functions</text:span></text:p>
              </text:list-item>
              <text:list-item>
                <text:p><text:span text:style-name="T5">Backward Propagation</text:span></text:p>
              </text:list-item>
              <text:list-item>
                <text:p><text:span text:style-name="T5">Random Initializat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8">What is a Neural Network?</text:span></text:p>
          </draw:text-box>
        </draw:frame>
        <draw:frame draw:style-name="gr9" draw:text-style-name="P8" draw:layer="layout" svg:width="9.447cm" svg:height="6.35cm" svg:x="15.713cm" svg:y="3.745cm">
          <draw:image xlink:href="Pictures/1000000100000147000000DC761C6507.png" xlink:type="simple" xlink:show="embed" xlink:actuate="onLoad" draw:mime-type="image/png">
            <text:p/>
          </draw:image>
        </draw:frame>
        <draw:custom-shape draw:name="object 5" draw:style-name="gr44" draw:text-style-name="P19" draw:layer="layout" svg:width="3.725cm" svg:height="2.292cm" svg:x="3.077cm" svg:y="5.4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5" draw:text-style-name="P20" draw:layer="layout" svg:width="9.2cm" svg:height="6.133cm" svg:x="1.673cm" svg:y="3.8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92cm" svg:height="0.952cm" svg:x="2.506cm" svg:y="9.034cm">
          <draw:image xlink:href="Pictures/100026900000076300000155827DC8D7.svg" xlink:type="simple" xlink:show="embed" xlink:actuate="onLoad" draw:mime-type="image/svg+xml">
            <text:p/>
          </draw:image>
          <draw:image xlink:href="Pictures/10000001000000470000000DCF6C9D3A.png" xlink:type="simple" xlink:show="embed" xlink:actuate="onLoad" draw:mime-type="image/png"/>
          <svg:title>TexMaths</svg:title>
          <svg:desc>28§display§z = w^{T}x + b§svg§600§TRUE§</svg:desc>
        </draw:frame>
        <draw:frame draw:style-name="gr9" draw:text-style-name="P8" draw:layer="layout" svg:width="3.556cm" svg:height="0.98cm" svg:x="2.487cm" svg:y="10.046cm">
          <draw:image xlink:href="Pictures/1000185F000004F70000015F3C5D3A8E.svg" xlink:type="simple" xlink:show="embed" xlink:actuate="onLoad" draw:mime-type="image/svg+xml">
            <text:p/>
          </draw:image>
          <draw:image xlink:href="Pictures/10000001000000300000000D813232DE.png" xlink:type="simple" xlink:show="embed" xlink:actuate="onLoad" draw:mime-type="image/png"/>
          <svg:title>TexMaths</svg:title>
          <svg:desc>28§display§a = \sigma(z)§svg§600§TRUE§</svg:desc>
        </draw:frame>
        <draw:frame draw:style-name="gr9" draw:text-style-name="P8" draw:layer="layout" svg:width="2.845cm" svg:height="1.056cm" svg:x="2.343cm" svg:y="11.048cm">
          <draw:image xlink:href="Pictures/10001AC5000003F90000017A0C517C05.svg" xlink:type="simple" xlink:show="embed" xlink:actuate="onLoad" draw:mime-type="image/svg+xml">
            <text:p/>
          </draw:image>
          <draw:image xlink:href="Pictures/10000001000000260000000E053D695A.png" xlink:type="simple" xlink:show="embed" xlink:actuate="onLoad" draw:mime-type="image/png"/>
          <svg:title>TexMaths</svg:title>
          <svg:desc>28§display§L(a,y)§svg§600§TRUE§</svg:desc>
        </draw:frame>
        <draw:frame draw:style-name="gr9" draw:text-style-name="P8" draw:layer="layout" svg:width="7.538cm" svg:height="1.002cm" svg:x="16.296cm" svg:y="8.374cm">
          <draw:image xlink:href="Pictures/1000292400000A8500000167BE3F3C0B.svg" xlink:type="simple" xlink:show="embed" xlink:actuate="onLoad" draw:mime-type="image/svg+xml">
            <text:p/>
          </draw:image>
          <draw:image xlink:href="Pictures/10000001000000660000000E7C39BCAF.png" xlink:type="simple" xlink:show="embed" xlink:actuate="onLoad" draw:mime-type="image/png"/>
          <svg:title>TexMaths</svg:title>
          <svg:desc>28§display§z^{[1]} = W^{[1]}x + b^{[1]}§svg§600§TRUE§</svg:desc>
        </draw:frame>
        <draw:frame draw:style-name="gr9" draw:text-style-name="P8" draw:layer="layout" svg:width="5.404cm" svg:height="1.24cm" svg:x="16.363cm" svg:y="9.655cm">
          <draw:image xlink:href="Pictures/10001E980000078B000001BCEDA546C8.svg" xlink:type="simple" xlink:show="embed" xlink:actuate="onLoad" draw:mime-type="image/svg+xml">
            <text:p/>
          </draw:image>
          <draw:image xlink:href="Pictures/10000001000000490000001134623C10.png" xlink:type="simple" xlink:show="embed" xlink:actuate="onLoad" draw:mime-type="image/png"/>
          <svg:title>TexMaths</svg:title>
          <svg:desc>28§display§a^{[1]} = \sigma(z^{[1]})§svg§600§TRUE§</svg:desc>
        </draw:frame>
        <draw:frame draw:style-name="gr9" draw:text-style-name="P8" draw:layer="layout" svg:width="8.383cm" svg:height="1.002cm" svg:x="16.474cm" svg:y="11.074cm">
          <draw:image xlink:href="Pictures/10002F3F00000BB3000001679DBF8394.svg" xlink:type="simple" xlink:show="embed" xlink:actuate="onLoad" draw:mime-type="image/svg+xml">
            <text:p/>
          </draw:image>
          <draw:image xlink:href="Pictures/10000001000000710000000E92D6E4D9.png" xlink:type="simple" xlink:show="embed" xlink:actuate="onLoad" draw:mime-type="image/png"/>
          <svg:title>TexMaths</svg:title>
          <svg:desc>28§display§z^{[2]} = W^{[2]}a^{[1]} + b^{[2]}§svg§600§TRUE§</svg:desc>
        </draw:frame>
        <draw:frame draw:style-name="gr9" draw:text-style-name="P8" draw:layer="layout" svg:width="5.404cm" svg:height="1.24cm" svg:x="16.463cm" svg:y="12.155cm">
          <draw:image xlink:href="Pictures/100021680000078B000001BC86C65C41.svg" xlink:type="simple" xlink:show="embed" xlink:actuate="onLoad" draw:mime-type="image/svg+xml">
            <text:p/>
          </draw:image>
          <draw:image xlink:href="Pictures/100000010000004900000011DC993421.png" xlink:type="simple" xlink:show="embed" xlink:actuate="onLoad" draw:mime-type="image/png"/>
          <svg:title>TexMaths</svg:title>
          <svg:desc>28§display§a^{[2]} = \sigma(z^{[2]})§svg§600§TRUE§</svg:desc>
        </draw:frame>
        <draw:frame draw:style-name="gr9" draw:text-style-name="P8" draw:layer="layout" svg:width="3.732cm" svg:height="1.24cm" svg:x="16.398cm" svg:y="13.355cm">
          <draw:image xlink:href="Pictures/10001F6400000536000001BC0B9CED85.svg" xlink:type="simple" xlink:show="embed" xlink:actuate="onLoad" draw:mime-type="image/svg+xml">
            <text:p/>
          </draw:image>
          <draw:image xlink:href="Pictures/1000000100000032000000119519213A.png" xlink:type="simple" xlink:show="embed" xlink:actuate="onLoad" draw:mime-type="image/png"/>
          <svg:title>TexMaths</svg:title>
          <svg:desc>28§display§L(a^{[2]},y)§svg§600§TRUE§</svg:desc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8">Neural Network Representation</text:span></text:p>
          </draw:text-box>
        </draw:frame>
        <draw:frame draw:style-name="gr9" draw:text-style-name="P8" draw:layer="layout" svg:width="11.692cm" svg:height="9.398cm" svg:x="1.27cm" svg:y="3.937cm">
          <draw:image xlink:href="Pictures/10000001000005930000047BBCC591E6.png" xlink:type="simple" xlink:show="embed" xlink:actuate="onLoad" draw:mime-type="image/png">
            <text:p/>
          </draw:image>
        </draw:frame>
        <draw:frame draw:style-name="gr9" draw:text-style-name="P8" draw:layer="layout" svg:width="14.483cm" svg:height="8.128cm" svg:x="12.734cm" svg:y="3.175cm">
          <draw:image xlink:href="Pictures/100000010000057C000003142601DF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8">Neural Network Representation</text:span></text:p>
          </draw:text-box>
        </draw:frame>
        <draw:frame draw:style-name="gr9" draw:text-style-name="P8" draw:layer="layout" svg:width="14.483cm" svg:height="8.128cm" svg:x="1.134cm" svg:y="4.075cm">
          <draw:image xlink:href="Pictures/100000010000057C000003142601DF17.png" xlink:type="simple" xlink:show="embed" xlink:actuate="onLoad" draw:mime-type="image/png">
            <text:p/>
          </draw:image>
        </draw:frame>
        <draw:frame draw:style-name="gr9" draw:text-style-name="P8" draw:layer="layout" svg:width="12.446cm" svg:height="6.985cm" svg:x="15.554cm" svg:y="4.445cm">
          <draw:image xlink:href="Pictures/100000010000057C000003149D91BA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8">Neural Network Representation</text:span></text:p>
          </draw:text-box>
        </draw:frame>
        <draw:frame draw:style-name="gr9" draw:text-style-name="P8" draw:layer="layout" svg:width="14.483cm" svg:height="8.128cm" svg:x="1.134cm" svg:y="4.075cm">
          <draw:image xlink:href="Pictures/100000010000057C000003142601DF17.png" xlink:type="simple" xlink:show="embed" xlink:actuate="onLoad" draw:mime-type="image/png">
            <text:p/>
          </draw:image>
        </draw:frame>
        <draw:frame draw:style-name="gr9" draw:text-style-name="P8" draw:layer="layout" svg:width="11.228cm" svg:height="10.402cm" svg:x="15.442cm" svg:y="3.568cm">
          <draw:image xlink:href="Pictures/1000000100000475000004216F7F42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8">Vectorization across multiple examples</text:span></text:p>
          </draw:text-box>
        </draw:frame>
        <draw:frame draw:style-name="gr9" draw:text-style-name="P8" draw:layer="layout" svg:width="11.274cm" svg:height="12.274cm" svg:x="15.396cm" svg:y="2.966cm">
          <draw:image xlink:href="Pictures/100000010000042F0000048E205DCF6D.png" xlink:type="simple" xlink:show="embed" xlink:actuate="onLoad" draw:mime-type="image/png">
            <text:p/>
          </draw:image>
        </draw:frame>
        <draw:frame draw:style-name="gr9" draw:text-style-name="P8" draw:layer="layout" svg:width="12.164cm" svg:height="13.209cm" svg:x="1.27cm" svg:y="2.54cm">
          <draw:image xlink:href="Pictures/100000010000048D000004F1527984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8">Activation Functions</text:span></text:p>
          </draw:text-box>
        </draw:frame>
        <draw:frame draw:style-name="gr9" draw:text-style-name="P8" draw:layer="layout" svg:width="13.139cm" svg:height="5.08cm" svg:x="0.831cm" svg:y="3.81cm">
          <draw:image xlink:href="Pictures/100000010000079E000002F2CA658C34.png" xlink:type="simple" xlink:show="embed" xlink:actuate="onLoad" draw:mime-type="image/png">
            <text:p/>
          </draw:image>
        </draw:frame>
        <draw:frame draw:style-name="gr9" draw:text-style-name="P8" draw:layer="layout" svg:width="13.14cm" svg:height="5.08cm" svg:x="13.97cm" svg:y="3.81cm">
          <draw:image xlink:href="Pictures/100000010000079E000002F25C160971.png" xlink:type="simple" xlink:show="embed" xlink:actuate="onLoad" draw:mime-type="image/png">
            <text:p/>
          </draw:image>
        </draw:frame>
        <draw:frame draw:style-name="gr46" draw:text-style-name="P7" draw:layer="layout" svg:width="26.617cm" svg:height="5.41cm" svg:x="0.688cm" svg:y="9.525cm">
          <draw:text-box>
            <text:p><text:span text:style-name="T5">Tanh Function is generally better than Sigmoid function</text:span></text:p>
            <text:p><text:span text:style-name="T5">Cause tanh center at 0, so average output is around 0, not 0.5</text:span></text:p>
            <text:p><text:span text:style-name="T5">Like sigmoid. This means gradients for next layers now push different</text:span></text:p>
            <text:p><text:span text:style-name="T5">Weights in different directions simultaneously, not zig-zaging. So training</text:span></text:p>
            <text:p><text:span text:style-name="T5">Is smoother and faster.</text:span></text:p>
            <text:p><text:span text:style-name="T5">But when binary classification we use output layer to be sigmoid,we do</text:span></text:p>
            <text:p><text:span text:style-name="T5">That because we need between 0 and 1, and Hidden layers to tanh to train fast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8">Activation Functions</text:span></text:p>
          </draw:text-box>
        </draw:frame>
        <draw:frame draw:style-name="gr47" draw:text-style-name="P7" draw:layer="layout" svg:width="27.477cm" svg:height="5.41cm" svg:x="0.688cm" svg:y="9.525cm">
          <draw:text-box>
            <text:p><text:span text:style-name="T5">Why ReLU is better than sigmoid and tanh is because its gradient is exactly 1, so </text:span></text:p>
            <text:p><text:span text:style-name="T5">It never shrinks and that is why deep NN(50, 100+ layers) can be trainable but </text:span></text:p>
            <text:p><text:span text:style-name="T5">Sigmoid and tanh impossible to train.</text:span></text:p>
            <text:p><text:span text:style-name="T5">Downside of ReLU is when z &lt; 0 its gradient is always 0 and never update</text:span></text:p>
            <text:p><text:span text:style-name="T5">Parameters. So neurons are effectively dead and contributes nothing to the training.</text:span></text:p>
            <text:p><text:span text:style-name="T5">Leaky ReLU solves this problem when z &lt; 0 and its gradient is 0.01 so it still updates</text:span></text:p>
            <text:p><text:span text:style-name="T5">Parameters and neurons become useable.</text:span></text:p>
          </draw:text-box>
        </draw:frame>
        <draw:frame draw:style-name="gr9" draw:text-style-name="P8" draw:layer="layout" svg:width="24.13cm" svg:height="6.556cm" svg:x="1.27cm" svg:y="2.969cm">
          <draw:image xlink:href="Pictures/100000010000098F0000037E6785E9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8">Backward Propagation</text:span></text:p>
          </draw:text-box>
        </draw:frame>
        <draw:frame draw:style-name="gr9" draw:text-style-name="P8" draw:layer="layout" svg:width="26.486cm" svg:height="11.114cm" svg:x="0.576cm" svg:y="3.81cm">
          <draw:image xlink:href="Pictures/1000000100000BCB000004F3EBFBDD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8">Random Initialization</text:span></text:p>
          </draw:text-box>
        </draw:frame>
        <draw:frame draw:style-name="gr48" draw:text-style-name="P7" draw:layer="layout" svg:width="26.759cm" svg:height="9.095cm" svg:x="1.27cm" svg:y="3.81cm">
          <draw:text-box>
            <text:p><text:span text:style-name="T5">Why need to initialize w to be random?</text:span></text:p>
            <text:p><text:span text:style-name="T5">If we initialize it to 0, z becomes 0 and A becomes zero too. So each layer and </text:span></text:p>
            <text:p><text:span text:style-name="T5">Each neurons output the same value. This basically means training with 1 layer</text:span></text:p>
            <text:p><text:span text:style-name="T5">And 1 neuron and other layers and neurons becomes useless. Another thing is </text:span></text:p>
            <text:p><text:span text:style-name="T5">When we calculate grdient, we got the identical gradient too.</text:span></text:p>
            <text:p><text:span text:style-name="T5">If we randomize, we get different weight so we train different edges and cases</text:span></text:p>
            <text:p><text:span text:style-name="T5">And each neuron starts learning differently.</text:span></text:p>
            <text:p><text:span text:style-name="T5">Why multiply by 0.01(very small values)?</text:span></text:p>
            <text:p><text:span text:style-name="T5">In sigmoid and tanh functions when z becomes relatively large or relatively small</text:span></text:p>
            <text:p><text:span text:style-name="T5">The gradient becomes very small. So it trains slower. That’s why need to start </text:span></text:p>
            <text:p><text:span text:style-name="T5">With very small values and it updates parameters quickly and get to the minimum</text:span></text:p>
            <text:p><text:span text:style-name="T5">Loss fastly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8">Week 4 Deep Neural Network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What is Deep Neural Network?</text:span></text:p>
              </text:list-item>
              <text:list-item>
                <text:p><text:span text:style-name="T5">Forward Propagation</text:span></text:p>
              </text:list-item>
              <text:list-item>
                <text:p><text:span text:style-name="T5">Why Deep Neural Network?</text:span></text:p>
              </text:list-item>
              <text:list-item>
                <text:p><text:span text:style-name="T5">Building blocks and Backward Propagation</text:span></text:p>
              </text:list-item>
              <text:list-item>
                <text:p><text:span text:style-name="T5">Hyperparameters and Parameter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8">What is Deep Neural Network?</text:span></text:p>
          </draw:text-box>
        </draw:frame>
        <draw:custom-shape draw:name="object 1" draw:style-name="gr44" draw:text-style-name="P19" draw:layer="layout" svg:width="3.725cm" svg:height="2.292cm" svg:x="2.477cm" svg:y="4.0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5" draw:text-style-name="P20" draw:layer="layout" svg:width="9.2cm" svg:height="6.133cm" svg:x="1.073cm" svg:y="2.4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49" draw:text-style-name="P22" draw:layer="layout" svg:width="6.756cm" svg:height="0.998cm" svg:x="2.452cm" svg:y="6.863cm">
          <text:p text:style-name="P21"><text:span text:style-name="T21">logistic</text:span><text:span text:style-name="T22"> </text:span><text:span text:style-name="T23">regress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50" draw:text-style-name="P23" draw:layer="layout" svg:width="8.655cm" svg:height="5.818cm" svg:x="15.175cm" svg:y="2.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51" draw:text-style-name="P22" draw:layer="layout" svg:width="5.407cm" svg:height="0.998cm" svg:x="17.06cm" svg:y="6.863cm">
          <text:p text:style-name="P21"><text:span text:style-name="T24">1 </text:span><text:span text:style-name="T25">hidden</text:span><text:span text:style-name="T26"> </text:span><text:span text:style-name="T27">lay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52" draw:text-style-name="P24" draw:layer="layout" svg:width="10.719cm" svg:height="6.448cm" svg:x="1.073cm" svg:y="8.8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53" draw:text-style-name="P22" draw:layer="layout" svg:width="5.778cm" svg:height="0.998cm" svg:x="2.127cm" svg:y="13.513cm">
          <text:p text:style-name="P21"><text:span text:style-name="T24">2 </text:span><text:span text:style-name="T25">hidden</text:span><text:span text:style-name="T28"> </text:span><text:span text:style-name="T29">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54" draw:text-style-name="P25" draw:layer="layout" svg:width="13.786cm" svg:height="6.448cm" svg:x="13.541cm" svg:y="8.8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55" draw:text-style-name="P22" draw:layer="layout" svg:width="5.778cm" svg:height="0.998cm" svg:x="17.06cm" svg:y="13.513cm">
          <text:p text:style-name="P21"><text:span text:style-name="T24">5 </text:span><text:span text:style-name="T25">hidden</text:span><text:span text:style-name="T28"> </text:span><text:span text:style-name="T29">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8">Forward Propagation</text:span></text:p>
          </draw:text-box>
        </draw:frame>
        <draw:custom-shape draw:name="object 3" draw:style-name="gr56" draw:text-style-name="P26" draw:layer="layout" svg:width="13.643cm" svg:height="6.42cm" svg:x="0.786cm" svg:y="2.9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.891cm" svg:height="0.555cm" svg:x="0.649cm" svg:y="9.746cm">
          <draw:image xlink:href="Pictures/100013C80000047B00000151981343FA.svg" xlink:type="simple" xlink:show="embed" xlink:actuate="onLoad" draw:mime-type="image/svg+xml">
            <text:p/>
          </draw:image>
          <draw:image xlink:href="Pictures/100000010000002B0000000DA6D74BFB.png" xlink:type="simple" xlink:show="embed" xlink:actuate="onLoad" draw:mime-type="image/png"/>
          <svg:title>TexMaths</svg:title>
          <svg:desc>28§display§n^{[0]} = 3§svg§600§TRUE§</svg:desc>
        </draw:frame>
        <draw:frame draw:style-name="gr9" draw:text-style-name="P8" draw:layer="layout" svg:width="1.973cm" svg:height="0.579cm" svg:x="3.756cm" svg:y="9.73cm">
          <draw:image xlink:href="Pictures/100013320000047800000151DEB0F115.svg" xlink:type="simple" xlink:show="embed" xlink:actuate="onLoad" draw:mime-type="image/svg+xml">
            <text:p/>
          </draw:image>
          <draw:image xlink:href="Pictures/100000010000002B0000000D6B61F59A.png" xlink:type="simple" xlink:show="embed" xlink:actuate="onLoad" draw:mime-type="image/png"/>
          <svg:title>TexMaths</svg:title>
          <svg:desc>28§display§n^{[1]} = 5§svg§600§TRUE§</svg:desc>
        </draw:frame>
        <draw:frame draw:style-name="gr9" draw:text-style-name="P8" draw:layer="layout" svg:width="1.902cm" svg:height="0.559cm" svg:x="6.353cm" svg:y="9.731cm">
          <draw:image xlink:href="Pictures/1000148B00000478000001512E64F221.svg" xlink:type="simple" xlink:show="embed" xlink:actuate="onLoad" draw:mime-type="image/svg+xml">
            <text:p/>
          </draw:image>
          <draw:image xlink:href="Pictures/100000010000002B0000000DC32C7258.png" xlink:type="simple" xlink:show="embed" xlink:actuate="onLoad" draw:mime-type="image/png"/>
          <svg:title>TexMaths</svg:title>
          <svg:desc>28§display§n^{[2]} = 5§svg§600§TRUE§</svg:desc>
        </draw:frame>
        <draw:frame draw:style-name="gr9" draw:text-style-name="P8" draw:layer="layout" svg:width="1.976cm" svg:height="0.58cm" svg:x="8.255cm" svg:y="8.31cm">
          <draw:image xlink:href="Pictures/100015F90000047B00000151C27EA9DA.svg" xlink:type="simple" xlink:show="embed" xlink:actuate="onLoad" draw:mime-type="image/svg+xml">
            <text:p/>
          </draw:image>
          <draw:image xlink:href="Pictures/100000010000002B0000000D5A517DF2.png" xlink:type="simple" xlink:show="embed" xlink:actuate="onLoad" draw:mime-type="image/png"/>
          <svg:title>TexMaths</svg:title>
          <svg:desc>28§display§n^{[3]} = 3§svg§600§TRUE§</svg:desc>
        </draw:frame>
        <draw:frame draw:style-name="gr9" draw:text-style-name="P8" draw:layer="layout" svg:width="1.686cm" svg:height="0.522cm" svg:x="10.435cm" svg:y="7.098cm">
          <draw:image xlink:href="Pictures/10000F90000004880000016817CBBED0.svg" xlink:type="simple" xlink:show="embed" xlink:actuate="onLoad" draw:mime-type="image/svg+xml">
            <text:p/>
          </draw:image>
          <draw:image xlink:href="Pictures/100000010000002C0000000EB16A444B.png" xlink:type="simple" xlink:show="embed" xlink:actuate="onLoad" draw:mime-type="image/png"/>
          <svg:title>TexMaths</svg:title>
          <svg:desc>28§display§n^{[4]} = 1§svg§600§TRUE§</svg:desc>
        </draw:frame>
        <draw:frame draw:style-name="gr9" draw:text-style-name="P8" draw:layer="layout" svg:width="0.635cm" svg:height="0.405cm" svg:x="1.835cm" svg:y="3.04cm">
          <draw:image xlink:href="Pictures/10000AF2000002050000014A63737B22.svg" xlink:type="simple" xlink:show="embed" xlink:actuate="onLoad" draw:mime-type="image/svg+xml">
            <text:p/>
          </draw:image>
          <draw:image xlink:href="Pictures/10000001000000140000000C44A7123D.png" xlink:type="simple" xlink:show="embed" xlink:actuate="onLoad" draw:mime-type="image/png"/>
          <svg:title>TexMaths</svg:title>
          <svg:desc>28§display§A^{[0]}§svg§600§TRUE§</svg:desc>
        </draw:frame>
        <draw:frame draw:style-name="gr9" draw:text-style-name="P8" draw:layer="layout" svg:width="0.828cm" svg:height="0.528cm" svg:x="4.535cm" svg:y="2.74cm">
          <draw:image xlink:href="Pictures/100009E6000002050000014A93EE71AE.svg" xlink:type="simple" xlink:show="embed" xlink:actuate="onLoad" draw:mime-type="image/svg+xml">
            <text:p/>
          </draw:image>
          <draw:image xlink:href="Pictures/10000001000000140000000C0323C93D.png" xlink:type="simple" xlink:show="embed" xlink:actuate="onLoad" draw:mime-type="image/png"/>
          <svg:title>TexMaths</svg:title>
          <svg:desc>28§display§A^{[1]}§svg§600§TRUE§</svg:desc>
        </draw:frame>
        <draw:frame draw:style-name="gr9" draw:text-style-name="P8" draw:layer="layout" svg:width="0.949cm" svg:height="0.605cm" svg:x="6.735cm" svg:y="2.64cm">
          <draw:image xlink:href="Pictures/10000B44000002050000014A7C537662.svg" xlink:type="simple" xlink:show="embed" xlink:actuate="onLoad" draw:mime-type="image/svg+xml">
            <text:p/>
          </draw:image>
          <draw:image xlink:href="Pictures/10000001000000140000000CD8090583.png" xlink:type="simple" xlink:show="embed" xlink:actuate="onLoad" draw:mime-type="image/png"/>
          <svg:title>TexMaths</svg:title>
          <svg:desc>28§display§A^{[2]}§svg§600§TRUE§</svg:desc>
        </draw:frame>
        <draw:frame draw:style-name="gr9" draw:text-style-name="P8" draw:layer="layout" svg:width="0.635cm" svg:height="0.405cm" svg:x="8.935cm" svg:y="3.84cm">
          <draw:image xlink:href="Pictures/10000D15000002050000014A4E5C09F0.svg" xlink:type="simple" xlink:show="embed" xlink:actuate="onLoad" draw:mime-type="image/svg+xml">
            <text:p/>
          </draw:image>
          <draw:image xlink:href="Pictures/10000001000000140000000C97F05FAB.png" xlink:type="simple" xlink:show="embed" xlink:actuate="onLoad" draw:mime-type="image/png"/>
          <svg:title>TexMaths</svg:title>
          <svg:desc>28§display§A^{[3]}§svg§600§TRUE§</svg:desc>
        </draw:frame>
        <draw:frame draw:style-name="gr9" draw:text-style-name="P8" draw:layer="layout" svg:width="0.634cm" svg:height="0.404cm" svg:x="10.936cm" svg:y="5.141cm">
          <draw:image xlink:href="Pictures/10000A2D000002050000014A3258B204.svg" xlink:type="simple" xlink:show="embed" xlink:actuate="onLoad" draw:mime-type="image/svg+xml">
            <text:p/>
          </draw:image>
          <draw:image xlink:href="Pictures/10000001000000140000000CCAAA6A8B.png" xlink:type="simple" xlink:show="embed" xlink:actuate="onLoad" draw:mime-type="image/png"/>
          <svg:title>TexMaths</svg:title>
          <svg:desc>28§display§A^{[4]}§svg§600§TRUE§</svg:desc>
        </draw:frame>
        <draw:frame draw:style-name="gr9" draw:text-style-name="P8" draw:layer="layout" svg:width="7.789cm" svg:height="8.323cm" svg:x="15.071cm" svg:y="3.364cm">
          <draw:image xlink:href="Pictures/1000C69400000C5200000D2AA08AAE56.svg" xlink:type="simple" xlink:show="embed" xlink:actuate="onLoad" draw:mime-type="image/svg+xml">
            <text:p/>
          </draw:image>
          <draw:image xlink:href="Pictures/10000001000000770000007F1E05ECF4.png" xlink:type="simple" xlink:show="embed" xlink:actuate="onLoad" draw:mime-type="image/png"/>
          <svg:title>TexMaths</svg:title>
          <svg:desc>28§latex§$$Z^{[1]} = W^{[1]}X +b^{[1]}$$
$$A^{[1]} = g^{[1]}(Z^{[1]})$$
$$Z^{[2]} = W^{[1]}A^{[1]} +b^{[2]}$$
$$A^{[2]} = g^{[2]}(Z^{[2]})$$

$$A^{[L]} = g^{[L]}(Z^{[L]})$$§svg§600§TRUE§</svg:desc>
        </draw:frame>
        <draw:frame draw:style-name="gr57" draw:text-style-name="P10" draw:layer="layout" svg:width="0.99cm" svg:height="1.116cm" draw:transform="rotate (-1.5707963267949) translate (18.704cm 9.304cm)">
          <draw:text-box>
            <text:p><text:span text:style-name="T30">…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<text:span text:style-name="T8">Why Deep Neural Network?</text:span></text:p>
          </draw:text-box>
        </draw:frame>
        <draw:g draw:name="Group 145" draw:style-name="gr58">
          <draw:frame draw:name="Object 1" draw:style-name="gr59" draw:text-style-name="P27" draw:layer="layout" svg:width="5.034cm" svg:height="3.928cm" svg:x="6.125cm" svg:y="9.338cm">
            <draw:object-ole draw:class-id="00000000-0000-0000-0000-000000000000" xlink:href="./Object 1" xlink:type="simple" xlink:show="embed" xlink:actuate="onLoad">
              <loext:p/>
            </draw:object-ole>
            <draw:image xlink:href="./ObjectReplacements/Object 1" xlink:type="simple" xlink:show="embed" xlink:actuate="onLoad"/>
          </draw:frame>
          <draw:custom-shape draw:name="Oval 1" draw:style-name="gr60" draw:text-style-name="P28" draw:layer="layout" svg:width="1.115cm" svg:height="1.111cm" svg:x="7.742cm" svg:y="4.84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" draw:style-name="gr60" draw:text-style-name="P28" draw:layer="layout" svg:width="1.115cm" svg:height="1.111cm" svg:x="7.742cm" svg:y="6.279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" draw:style-name="gr60" draw:text-style-name="P28" draw:layer="layout" svg:width="1.115cm" svg:height="1.111cm" svg:x="7.742cm" svg:y="7.713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60" draw:text-style-name="P28" draw:layer="layout" svg:width="1.115cm" svg:height="1.111cm" svg:x="7.742cm" svg:y="3.4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onnector draw:name="Straight Arrow Connector 65" draw:style-name="gr61" draw:text-style-name="P27" draw:layer="layout" draw:type="line" svg:x1="5.51cm" svg:y1="6.065cm" svg:x2="6.966cm" svg:y2="6.062cm" svg:d="M5510 6065l1456-3" svg:viewBox="0 0 1457 4">
          <text:p/>
        </draw:connector>
        <draw:g draw:name="Group 162" draw:style-name="gr58">
          <draw:frame draw:name="Picture 19" draw:style-name="gr62" draw:text-style-name="P27" draw:layer="layout" svg:width="5.43cm" svg:height="3.928cm" svg:x="11.532cm" svg:y="9.338cm">
            <draw:image xlink:href="Pictures/1000000100000142000000DF84BDF6F9.png" xlink:type="simple" xlink:show="embed" xlink:actuate="onLoad" draw:mime-type="image/png">
              <text:p/>
            </draw:image>
          </draw:frame>
          <draw:g draw:name="Group 160" draw:style-name="gr58">
            <draw:connector draw:name="Straight Arrow Connector 96" draw:style-name="gr63" draw:text-style-name="P27" draw:layer="layout" draw:type="line" svg:x1="8.857cm" svg:y1="6.833cm" svg:x2="13.689cm" svg:y2="6.166cm" svg:d="M8857 6833l4832-667" svg:viewBox="0 0 4833 668">
              <text:p/>
            </draw:connector>
            <draw:connector draw:name="Straight Arrow Connector 99" draw:style-name="gr63" draw:text-style-name="P27" draw:layer="layout" draw:type="line" svg:x1="8.857cm" svg:y1="6.833cm" svg:x2="13.689cm" svg:y2="4.731cm" svg:d="M8857 6833l4832-2102" svg:viewBox="0 0 4833 2103">
              <text:p/>
            </draw:connector>
            <draw:g draw:name="Group 159" draw:style-name="gr58">
              <draw:custom-shape draw:name="Oval 66" draw:style-name="gr60" draw:text-style-name="P28" draw:layer="layout" svg:width="1.115cm" svg:height="1.111cm" svg:x="13.69cm" svg:y="4.176cm">
                <text:p/>
    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7" draw:style-name="gr64" draw:text-style-name="P28" draw:layer="layout" svg:width="1.115cm" svg:height="1.112cm" svg:x="13.69cm" svg:y="5.61cm">
                <text:p/>
    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8" draw:style-name="gr60" draw:text-style-name="P28" draw:layer="layout" svg:width="1.115cm" svg:height="1.111cm" svg:x="13.69cm" svg:y="7.044cm">
                <text:p/>
    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onnector draw:name="Straight Arrow Connector 73" draw:style-name="gr63" draw:text-style-name="P27" draw:layer="layout" draw:type="line" svg:x1="8.857cm" svg:y1="3.94cm" svg:x2="13.689cm" svg:y2="4.731cm" svg:d="M8857 3940l4832 791" svg:viewBox="0 0 4833 792">
                <text:p/>
              </draw:connector>
              <draw:connector draw:name="Straight Arrow Connector 75" draw:style-name="gr63" draw:text-style-name="P27" draw:layer="layout" draw:type="line" svg:x1="8.857cm" svg:y1="5.401cm" svg:x2="13.689cm" svg:y2="6.166cm" svg:d="M8857 5401l4832 765" svg:viewBox="0 0 4833 766">
                <text:p/>
              </draw:connector>
              <draw:connector draw:name="Straight Arrow Connector 78" draw:style-name="gr63" draw:text-style-name="P27" draw:layer="layout" draw:type="line" svg:x1="8.857cm" svg:y1="6.833cm" svg:x2="13.689cm" svg:y2="7.6cm" svg:d="M8857 6833l4832 767" svg:viewBox="0 0 4833 768">
                <text:p/>
              </draw:connector>
              <draw:connector draw:name="Straight Arrow Connector 81" draw:style-name="gr63" draw:text-style-name="P27" draw:layer="layout" draw:type="line" svg:x1="8.857cm" svg:y1="8.269cm" svg:x2="13.689cm" svg:y2="7.6cm" svg:d="M8857 8269l4832-669" svg:viewBox="0 0 4833 670">
                <text:p/>
              </draw:connector>
              <draw:connector draw:name="Straight Arrow Connector 84" draw:style-name="gr63" draw:text-style-name="P27" draw:layer="layout" draw:type="line" svg:x1="8.857cm" svg:y1="8.269cm" svg:x2="13.689cm" svg:y2="6.166cm" svg:d="M8857 8269l4832-2103" svg:viewBox="0 0 4833 2104">
                <text:p/>
              </draw:connector>
              <draw:connector draw:name="Straight Arrow Connector 87" draw:style-name="gr63" draw:text-style-name="P27" draw:layer="layout" draw:type="line" svg:x1="8.857cm" svg:y1="8.269cm" svg:x2="13.689cm" svg:y2="4.731cm" svg:d="M8857 8269l4832-3538" svg:viewBox="0 0 4833 3539">
                <text:p/>
              </draw:connector>
              <draw:connector draw:name="Straight Arrow Connector 90" draw:style-name="gr63" draw:text-style-name="P27" draw:layer="layout" draw:type="line" svg:x1="8.857cm" svg:y1="5.401cm" svg:x2="13.689cm" svg:y2="4.731cm" svg:d="M8857 5401l4832-670" svg:viewBox="0 0 4833 671">
                <text:p/>
              </draw:connector>
              <draw:connector draw:name="Straight Arrow Connector 93" draw:style-name="gr63" draw:text-style-name="P27" draw:layer="layout" draw:type="line" svg:x1="8.857cm" svg:y1="5.401cm" svg:x2="13.689cm" svg:y2="7.6cm" svg:d="M8857 5401l4832 2199" svg:viewBox="0 0 4833 2200">
                <text:p/>
              </draw:connector>
              <draw:connector draw:name="Straight Arrow Connector 102" draw:style-name="gr63" draw:text-style-name="P27" draw:layer="layout" draw:type="line" svg:x1="8.857cm" svg:y1="3.965cm" svg:x2="13.689cm" svg:y2="6.166cm" svg:d="M8857 3965l4832 2201" svg:viewBox="0 0 4833 2202">
                <text:p/>
              </draw:connector>
              <draw:connector draw:name="Straight Arrow Connector 105" draw:style-name="gr63" draw:text-style-name="P27" draw:layer="layout" draw:type="line" svg:x1="8.857cm" svg:y1="3.965cm" svg:x2="13.689cm" svg:y2="7.6cm" svg:d="M8857 3965l4832 3635" svg:viewBox="0 0 4833 3636">
                <text:p/>
              </draw:connector>
            </draw:g>
          </draw:g>
        </draw:g>
        <draw:g draw:name="Group 163" draw:style-name="gr58">
          <draw:frame draw:name="Picture 20" draw:style-name="gr65" draw:text-style-name="P27" draw:layer="layout" svg:width="5.721cm" svg:height="3.947cm" svg:x="17.335cm" svg:y="9.338cm">
            <draw:image xlink:href="Pictures/1000000100000142000000ECB306BA26.png" xlink:type="simple" xlink:show="embed" xlink:actuate="onLoad" draw:mime-type="image/png">
              <text:p/>
            </draw:image>
          </draw:frame>
          <draw:g draw:name="Group 161" draw:style-name="gr58">
            <draw:custom-shape draw:name="Oval 69" draw:style-name="gr60" draw:text-style-name="P28" draw:layer="layout" svg:width="1.115cm" svg:height="1.111cm" svg:x="19.637cm" svg:y="4.975cm">
              <text:p/>
  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0" draw:style-name="gr64" draw:text-style-name="P28" draw:layer="layout" svg:width="1.115cm" svg:height="1.112cm" svg:x="19.637cm" svg:y="6.409cm">
              <text:p/>
  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1" draw:style-name="gr66" draw:text-style-name="P28" draw:layer="layout" svg:width="1.113cm" svg:height="1.111cm" svg:x="23.913cm" svg:y="5.647cm">
              <text:p/>
  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onnector draw:name="Straight Arrow Connector 108" draw:style-name="gr63" draw:text-style-name="P27" draw:layer="layout" draw:type="line" svg:x1="14.805cm" svg:y1="4.731cm" svg:x2="19.637cm" svg:y2="5.53cm" svg:d="M14805 4731l4832 799" svg:viewBox="0 0 4833 800">
              <text:p/>
            </draw:connector>
            <draw:connector draw:name="Straight Arrow Connector 111" draw:style-name="gr63" draw:text-style-name="P27" draw:layer="layout" draw:type="line" svg:x1="14.805cm" svg:y1="4.731cm" svg:x2="19.637cm" svg:y2="6.965cm" svg:d="M14805 4731l4832 2234" svg:viewBox="0 0 4833 2235">
              <text:p/>
            </draw:connector>
            <draw:connector draw:name="Straight Arrow Connector 114" draw:style-name="gr63" draw:text-style-name="P27" draw:layer="layout" draw:type="line" svg:x1="14.805cm" svg:y1="6.166cm" svg:x2="19.637cm" svg:y2="5.53cm" svg:d="M14805 6166l4832-636" svg:viewBox="0 0 4833 637">
              <text:p/>
            </draw:connector>
            <draw:connector draw:name="Straight Arrow Connector 117" draw:style-name="gr63" draw:text-style-name="P27" draw:layer="layout" draw:type="line" svg:x1="14.805cm" svg:y1="6.166cm" svg:x2="19.637cm" svg:y2="6.965cm" svg:d="M14805 6166l4832 799" svg:viewBox="0 0 4833 800">
              <text:p/>
            </draw:connector>
            <draw:connector draw:name="Straight Arrow Connector 120" draw:style-name="gr63" draw:text-style-name="P27" draw:layer="layout" draw:type="line" svg:x1="14.805cm" svg:y1="7.6cm" svg:x2="19.637cm" svg:y2="6.965cm" svg:d="M14805 7600l4832-635" svg:viewBox="0 0 4833 636">
              <text:p/>
            </draw:connector>
            <draw:connector draw:name="Straight Arrow Connector 123" draw:style-name="gr63" draw:text-style-name="P27" draw:layer="layout" draw:type="line" svg:x1="14.805cm" svg:y1="7.6cm" svg:x2="19.637cm" svg:y2="5.53cm" svg:d="M14805 7600l4832-2070" svg:viewBox="0 0 4833 2071">
              <text:p/>
            </draw:connector>
            <draw:connector draw:name="Straight Arrow Connector 126" draw:style-name="gr63" draw:text-style-name="P27" draw:layer="layout" draw:type="line" svg:x1="20.753cm" svg:y1="5.53cm" svg:x2="23.913cm" svg:y2="6.203cm" svg:d="M20753 5530l3160 673" svg:viewBox="0 0 3161 674">
              <text:p/>
            </draw:connector>
            <draw:connector draw:name="Straight Arrow Connector 129" draw:style-name="gr63" draw:text-style-name="P27" draw:layer="layout" draw:type="line" svg:x1="20.753cm" svg:y1="6.965cm" svg:x2="23.913cm" svg:y2="6.203cm" svg:d="M20753 6965l3160-762" svg:viewBox="0 0 3161 763">
              <text:p/>
            </draw:connector>
            <draw:connector draw:name="Straight Arrow Connector 132" draw:style-name="gr63" draw:text-style-name="P27" draw:layer="layout" draw:type="line" svg:x1="25.027cm" svg:y1="6.203cm" svg:x2="26.486cm" svg:y2="6.203cm" svg:d="M25027 6203h1459" svg:viewBox="0 0 1460 1">
              <text:p/>
            </draw:connector>
            <draw:custom-shape draw:name="TextBox 139" draw:style-name="gr67" draw:text-style-name="P30" draw:layer="layout" svg:width="1.168cm" svg:height="1.047cm" svg:x="26.487cm" svg:y="5.679cm">
              <text:p text:style-name="P29"><text:span text:style-name="T31"> 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Picture 166" draw:style-name="gr68" draw:text-style-name="P27" draw:layer="layout" svg:width="4.553cm" svg:height="4.425cm" svg:x="0.695cm" svg:y="3.73cm">
          <draw:image xlink:href="Pictures/100000010000018E0000018EA1715AF9.tif" xlink:type="simple" xlink:show="embed" xlink:actuate="onLoad" draw:mime-type="image/tiff">
            <text:p/>
          </draw:image>
        </draw:frame>
        <draw:frame draw:name="Picture 4" draw:style-name="gr68" draw:text-style-name="P27" draw:layer="layout" svg:width="4.667cm" svg:height="4.613cm" svg:x="0.605cm" svg:y="3.56cm">
          <draw:image xlink:href="Pictures/10000000000000FA000000F8D8401BD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text-style-name="P5" draw:layer="layout" svg:width="25.199cm" svg:height="2.957cm" svg:x="1.4cm" svg:y="0.464cm" presentation:class="title" presentation:user-transformed="true">
          <draw:text-box>
            <text:list text:style-name="L2">
              <text:list-header>
                <text:p text:style-name="P16"><text:span text:style-name="T8">Building blocks and Backward Propagation</text:span></text:p>
              </text:list-header>
            </text:list>
          </draw:text-box>
        </draw:frame>
        <draw:frame draw:style-name="gr69" draw:text-style-name="P7" draw:layer="layout" svg:width="24.515cm" svg:height="2.462cm" svg:x="0.84cm" svg:y="3.745cm">
          <draw:text-box>
            <text:p><text:span text:style-name="T5">At each layer of forward propagation ,We will save Z to cache to use it later</text:span></text:p>
            <text:p><text:span text:style-name="T5">In backward propagation. And After each backward propagation, we save </text:span></text:p>
            <text:p><text:span text:style-name="T5">dW and db to grad cache too to later to update parameters.</text:span></text:p>
          </draw:text-box>
        </draw:frame>
        <draw:frame draw:style-name="gr9" draw:text-style-name="P8" draw:layer="layout" svg:width="15.959cm" svg:height="9.325cm" svg:x="1.186cm" svg:y="6.207cm">
          <draw:image xlink:href="Pictures/10000001000005D1000003665B39E8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6"><text:span text:style-name="T8">Hyperparameters and Parameters</text:span></text:p>
              </text:list-header>
            </text:list>
          </draw:text-box>
        </draw:frame>
        <draw:frame draw:style-name="gr70" draw:text-style-name="P7" draw:layer="layout" svg:width="24.765cm" svg:height="6.35cm" svg:x="0.635cm" svg:y="3.81cm">
          <draw:text-box>
            <text:p><text:span text:style-name="T5">Parameters are W[1] and b[1] - they are learned directly from the data during training. Hyperparameters are the settings that control how training happens: the learning rate a, number of iterations, number of layers L, number of units n[1] in each layer, and the choice of activation function g[1] at each layer. Later hyperparameters include momentum, mini-batch size, and regularization. Hyperparameters ultimately determine what the learned parameters will b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text-style-name="P5" draw:layer="layout" svg:width="25.199cm" svg:height="3.625cm" svg:x="1.4cm" svg:y="6.13cm" presentation:class="title" presentation:user-transformed="true">
          <draw:text-box>
            <text:p><text:span text:style-name="T5">Thank You!!!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Light" svg:font-family="'DejaVu Sans Light'" style:font-family-generic="swiss"/>
    <style:font-face style:name="DejaVu Sans Light1" svg:font-family="'DejaVu Sans Light'" style:font-adornments="Regular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Light3" svg:font-family="'DejaVu Sans Light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  <style:font-face style:name="TexMaths Symbols1" svg:font-family="'TexMaths Symbols'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04E00000047DC5EBC82.png" xlink:type="simple" xlink:show="embed" xlink:actuate="onLoad"/>
    <draw:fill-image draw:name="msFillBitmap_20_10" draw:display-name="msFillBitmap 10" xlink:href="Pictures/10000001000001E1000000E17A23C8CD.png" xlink:type="simple" xlink:show="embed" xlink:actuate="onLoad"/>
    <draw:fill-image draw:name="msFillBitmap_20_19" draw:display-name="msFillBitmap 19" xlink:href="Pictures/10000001000001DC000000E061CB0ACC.png" xlink:type="simple" xlink:show="embed" xlink:actuate="onLoad"/>
    <draw:fill-image draw:name="msFillBitmap_20_6" draw:display-name="msFillBitmap 6" xlink:href="Pictures/100000010000008200000050266F300C.png" xlink:type="simple" xlink:show="embed" xlink:actuate="onLoad"/>
    <draw:fill-image draw:name="msFillBitmap_20_7" draw:display-name="msFillBitmap 7" xlink:href="Pictures/1000000100000141000000D62E638D64.png" xlink:type="simple" xlink:show="embed" xlink:actuate="onLoad"/>
    <draw:fill-image draw:name="msFillBitmap_20_8" draw:display-name="msFillBitmap 8" xlink:href="Pictures/100000010000012E000000CB08781F6A.png" xlink:type="simple" xlink:show="embed" xlink:actuate="onLoad"/>
    <draw:fill-image draw:name="msFillBitmap_20_9" draw:display-name="msFillBitmap 9" xlink:href="Pictures/1000000100000176000000E12945BDD0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22:41:12.003484302</meta:creation-date>
    <dc:date>2026-06-10T20:39:52.203724193</dc:date>
    <meta:editing-duration>P6DT23H42M43S</meta:editing-duration>
    <meta:editing-cycles>7</meta:editing-cycles>
    <meta:generator>LibreOffice/26.2.2.2$Linux_X86_64 LibreOffice_project/620$Build-2</meta:generator>
    <meta:document-statistic meta:object-count="315"/>
  </office:meta>
</office:document-meta>
</file>